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D0000004109C5450E173A5E502.png" manifest:media-type="image/png"/>
  <manifest:file-entry manifest:full-path="Pictures/10000001000007D00000041014B1EBE9F7F96EAC.png" manifest:media-type="image/png"/>
  <manifest:file-entry manifest:full-path="Pictures/100000010000006400000064593EF5D0ABAB03F5.png" manifest:media-type="image/png"/>
  <manifest:file-entry manifest:full-path="Pictures/1000000100000064000000645091F1AABB5BE5AC.png" manifest:media-type="image/png"/>
  <manifest:file-entry manifest:full-path="Pictures/1000000100000073000000641F86D86CDAC4DDBE.png" manifest:media-type="image/png"/>
  <manifest:file-entry manifest:full-path="Pictures/10000001000007D000000410CA6A3FB55CCB3150.png" manifest:media-type="image/png"/>
  <manifest:file-entry manifest:full-path="Pictures/10000001000007D0000004102E3B3ABD4D448522.png" manifest:media-type="image/png"/>
  <manifest:file-entry manifest:full-path="Pictures/100000010000006400000064CC2FAEFDF79FD61B.png" manifest:media-type="image/png"/>
  <manifest:file-entry manifest:full-path="Pictures/10000001000007D0000004104C56FC570F3CA430.png" manifest:media-type="image/png"/>
  <manifest:file-entry manifest:full-path="Pictures/1000000100000064000000649F6C487DED0FB695.png" manifest:media-type="image/png"/>
  <manifest:file-entry manifest:full-path="Pictures/100000010000006400000064A9822BC4B3963346.png" manifest:media-type="image/png"/>
  <manifest:file-entry manifest:full-path="Pictures/10000001000000640000006436DE474D9C193B3D.png" manifest:media-type="image/png"/>
  <manifest:file-entry manifest:full-path="Pictures/10000001000000640000006448F9F31E2308037E.png" manifest:media-type="image/png"/>
  <manifest:file-entry manifest:full-path="Pictures/10000001000007D00000041069419D0530A5A85C.png" manifest:media-type="image/png"/>
  <manifest:file-entry manifest:full-path="Pictures/1000000100000064000000647F111E6C6588B849.png" manifest:media-type="image/png"/>
  <manifest:file-entry manifest:full-path="Pictures/10000001000007D000000410E20E48C8CE00E828.png" manifest:media-type="image/png"/>
  <manifest:file-entry manifest:full-path="Pictures/100000010000006400000064B811DB04FA0728B6.png" manifest:media-type="image/png"/>
  <manifest:file-entry manifest:full-path="Pictures/1000000100000064000000641488C0188597186B.png" manifest:media-type="image/png"/>
  <manifest:file-entry manifest:full-path="Pictures/10000001000007D000000410819B36F60A2BE987.png" manifest:media-type="image/png"/>
  <manifest:file-entry manifest:full-path="Pictures/10000001000000640000006445BD65E4E0981768.png" manifest:media-type="image/png"/>
  <manifest:file-entry manifest:full-path="Pictures/1000000100000064000000647BE45AD0E8618197.png" manifest:media-type="image/png"/>
  <manifest:file-entry manifest:full-path="Pictures/1000000100000064000000648813B6AC09DB83E9.png" manifest:media-type="image/png"/>
  <manifest:file-entry manifest:full-path="Pictures/10000001000007D00000041038A8F7C960135CDF.png" manifest:media-type="image/png"/>
  <manifest:file-entry manifest:full-path="Pictures/10000001000007D0000004109EE6AEDD4DBB224F.png" manifest:media-type="image/png"/>
  <manifest:file-entry manifest:full-path="Pictures/10000001000000640000006405058DC98882AF6D.png" manifest:media-type="image/png"/>
  <manifest:file-entry manifest:full-path="Pictures/10000001000007D0000004105B77D42805B52FCC.png" manifest:media-type="image/png"/>
  <manifest:file-entry manifest:full-path="Pictures/10000001000007D000000410F8F15C433F769109.png" manifest:media-type="image/png"/>
  <manifest:file-entry manifest:full-path="Pictures/10000001000000A400000064105341F3A17CE00B.png" manifest:media-type="image/png"/>
  <manifest:file-entry manifest:full-path="Pictures/10000001000000A40000006486E0E11AC61FE69C.png" manifest:media-type="image/png"/>
  <manifest:file-entry manifest:full-path="Pictures/10000001000007D00000041006FDE945B446C44D.png" manifest:media-type="image/png"/>
  <manifest:file-entry manifest:full-path="Pictures/1000000100000064000000646B7D824BAC4ED5C6.png" manifest:media-type="image/png"/>
  <manifest:file-entry manifest:full-path="Pictures/100000010000006400000064A99A9627F106C218.png" manifest:media-type="image/png"/>
  <manifest:file-entry manifest:full-path="Pictures/100000010000006400000064D132A40BCADF3785.png" manifest:media-type="image/png"/>
  <manifest:file-entry manifest:full-path="Pictures/10000001000007D00000041025E34A828F9F6765.png" manifest:media-type="image/png"/>
  <manifest:file-entry manifest:full-path="Pictures/1000000100000064000000647806C8236C15D24F.png" manifest:media-type="image/png"/>
  <manifest:file-entry manifest:full-path="Pictures/100000010000006400000073081E32AAC9D1C699.png" manifest:media-type="image/png"/>
  <manifest:file-entry manifest:full-path="Pictures/10000001000000640000006431B350D74D276436.png" manifest:media-type="image/png"/>
  <manifest:file-entry manifest:full-path="Pictures/100000010000006400000064E1B07EAA778F88B2.png" manifest:media-type="image/png"/>
  <manifest:file-entry manifest:full-path="Pictures/10000001000007D000000410F9CC320FCA213790.png" manifest:media-type="image/png"/>
  <manifest:file-entry manifest:full-path="Pictures/100000010000006400000064938FB202B86E4B61.png" manifest:media-type="image/png"/>
  <manifest:file-entry manifest:full-path="Pictures/1000000100000064000000645038D412BFE00129.png" manifest:media-type="image/png"/>
  <manifest:file-entry manifest:full-path="Pictures/10000001000007D0000004108240299E2D0363CF.png" manifest:media-type="image/png"/>
  <manifest:file-entry manifest:full-path="Pictures/10000001000001DD000000730E14E12F31FD2511.png" manifest:media-type="image/png"/>
  <manifest:file-entry manifest:full-path="Pictures/1000000100000064000000646623D71B234B7EEA.png" manifest:media-type="image/png"/>
  <manifest:file-entry manifest:full-path="Pictures/10000001000007D0000004107C4B523A6295C19A.png" manifest:media-type="image/png"/>
  <manifest:file-entry manifest:full-path="Pictures/100000010000006400000064EE915BB3A728221B.png" manifest:media-type="image/png"/>
  <manifest:file-entry manifest:full-path="Pictures/10000001000007D000000410282D63EBE2ED24A1.png" manifest:media-type="image/png"/>
  <manifest:file-entry manifest:full-path="Pictures/100000010000005000000050BCD77890C0634037.png" manifest:media-type="image/png"/>
  <manifest:file-entry manifest:full-path="Pictures/10000001000007D000000410A5696200D474136F.png" manifest:media-type="image/png"/>
  <manifest:file-entry manifest:full-path="Pictures/100000010000006400000064125958B34D2B4211.png" manifest:media-type="image/png"/>
  <manifest:file-entry manifest:full-path="Pictures/10000001000000640000006417BFF191A6565D1D.png" manifest:media-type="image/png"/>
  <manifest:file-entry manifest:full-path="Pictures/10000001000007D0000004109782046A1B1A6C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errum" svg:font-family="Ferr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shat" svg:font-family="Seshat" style:font-family-generic="modern" style:font-pitch="variable"/>
  </office:font-face-decls>
  <office:automatic-styles>
    <style:style style:name="Tabella2" style:family="table">
      <style:table-properties style:width="8.25cm" table:align="margins"/>
    </style:style>
    <style:style style:name="Tabella2.A" style:family="table-column">
      <style:table-column-properties style:column-width="8.25cm" style:rel-column-width="65535*"/>
    </style:style>
    <style:style style:name="Tabella2.1" style:family="table-row">
      <style:table-row-properties fo:background-color="transparent">
        <style:background-image/>
      </style:table-row-properties>
    </style:style>
    <style:style style:name="Tabella2.A1" style:family="table-cell">
      <style:table-cell-properties fo:padding="0.097cm" fo:border="0.05pt solid #000000"/>
    </style:style>
    <style:style style:name="Tabella1" style:family="table">
      <style:table-properties style:width="8.25cm" table:align="margins" fo:background-color="transparent">
        <style:background-image/>
      </style:table-properties>
    </style:style>
    <style:style style:name="Tabella1.A" style:family="table-column">
      <style:table-column-properties style:column-width="8.25cm" style:rel-column-width="65535*"/>
    </style:style>
    <style:style style:name="Tabella1.1" style:family="table-row">
      <style:table-row-properties fo:background-color="transparent">
        <style:background-image/>
      </style:table-row-properties>
    </style:style>
    <style:style style:name="Tabella1.A1" style:family="table-cell">
      <style:table-cell-properties fo:background-color="#ffd8ce" fo:padding="0.097cm" fo:border="0.05pt solid #000000">
        <style:background-image/>
      </style:table-cell-properties>
    </style:style>
    <style:style style:name="Tabella3" style:family="table">
      <style:table-properties style:width="8.25cm" table:align="margins" fo:background-color="transparent">
        <style:background-image/>
      </style:table-properties>
    </style:style>
    <style:style style:name="Tabella3.A" style:family="table-column">
      <style:table-column-properties style:column-width="8.25cm" style:rel-column-width="65535*"/>
    </style:style>
    <style:style style:name="Tabella3.1" style:family="table-row">
      <style:table-row-properties fo:background-color="transparent">
        <style:background-image/>
      </style:table-row-properties>
    </style:style>
    <style:style style:name="Tabella3.A1" style:family="table-cell">
      <style:table-cell-properties fo:background-color="#ffd8ce" fo:padding="0.097cm" fo:border="0.05pt solid #000000">
        <style:background-image/>
      </style:table-cell-properties>
    </style:style>
    <style:style style:name="Tabella4" style:family="table">
      <style:table-properties style:width="8.25cm" table:align="margins" fo:background-color="transparent">
        <style:background-image/>
      </style:table-properties>
    </style:style>
    <style:style style:name="Tabella4.A" style:family="table-column">
      <style:table-column-properties style:column-width="8.25cm" style:rel-column-width="65535*"/>
    </style:style>
    <style:style style:name="Tabella4.1" style:family="table-row">
      <style:table-row-properties fo:background-color="transparent">
        <style:background-image/>
      </style:table-row-properties>
    </style:style>
    <style:style style:name="Tabella4.A1" style:family="table-cell">
      <style:table-cell-properties fo:background-color="#ffd8ce" fo:padding="0.097cm" fo:border="0.05pt solid #000000">
        <style:background-image/>
      </style:table-cell-properties>
    </style:style>
    <style:style style:name="Tabella5" style:family="table">
      <style:table-properties style:width="8.25cm" table:align="margins" fo:background-color="transparent">
        <style:background-image/>
      </style:table-properties>
    </style:style>
    <style:style style:name="Tabella5.A" style:family="table-column">
      <style:table-column-properties style:column-width="8.25cm" style:rel-column-width="65535*"/>
    </style:style>
    <style:style style:name="Tabella5.1" style:family="table-row">
      <style:table-row-properties fo:background-color="transparent">
        <style:background-image/>
      </style:table-row-properties>
    </style:style>
    <style:style style:name="Tabella5.A1" style:family="table-cell">
      <style:table-cell-properties fo:background-color="#ffd8ce" fo:padding="0.097cm" fo:border="0.05pt solid #000000">
        <style:background-image/>
      </style:table-cell-properties>
    </style:style>
    <style:style style:name="Tabella6" style:family="table">
      <style:table-properties style:width="8.25cm" table:align="margins" fo:background-color="transparent">
        <style:background-image/>
      </style:table-properties>
    </style:style>
    <style:style style:name="Tabella6.A" style:family="table-column">
      <style:table-column-properties style:column-width="8.25cm" style:rel-column-width="65535*"/>
    </style:style>
    <style:style style:name="Tabella6.1" style:family="table-row">
      <style:table-row-properties fo:background-color="transparent">
        <style:background-image/>
      </style:table-row-properties>
    </style:style>
    <style:style style:name="Tabella6.A1" style:family="table-cell">
      <style:table-cell-properties fo:background-color="#ffd8ce" fo:padding="0.097cm" fo:border="0.05pt solid #000000">
        <style:background-image/>
      </style:table-cell-properties>
    </style:style>
    <style:style style:name="Tabella7" style:family="table">
      <style:table-properties style:width="8.25cm" table:align="margins" fo:background-color="transparent">
        <style:background-image/>
      </style:table-properties>
    </style:style>
    <style:style style:name="Tabella7.A" style:family="table-column">
      <style:table-column-properties style:column-width="8.25cm" style:rel-column-width="65535*"/>
    </style:style>
    <style:style style:name="Tabella7.1" style:family="table-row">
      <style:table-row-properties fo:background-color="transparent">
        <style:background-image/>
      </style:table-row-properties>
    </style:style>
    <style:style style:name="Tabella7.A1" style:family="table-cell">
      <style:table-cell-properties fo:background-color="#ffd8ce" fo:padding="0.097cm" fo:border="0.05pt solid #000000">
        <style:background-image/>
      </style:table-cell-properties>
    </style:style>
    <style:style style:name="Tabella8" style:family="table">
      <style:table-properties style:width="8.25cm" table:align="margins" fo:background-color="transparent">
        <style:background-image/>
      </style:table-properties>
    </style:style>
    <style:style style:name="Tabella8.A" style:family="table-column">
      <style:table-column-properties style:column-width="8.25cm" style:rel-column-width="65535*"/>
    </style:style>
    <style:style style:name="Tabella8.1" style:family="table-row">
      <style:table-row-properties fo:background-color="transparent">
        <style:background-image/>
      </style:table-row-properties>
    </style:style>
    <style:style style:name="Tabella8.A1" style:family="table-cell">
      <style:table-cell-properties fo:background-color="#ffd8ce" fo:padding="0.097cm" fo:border="0.05pt solid #000000">
        <style:background-image/>
      </style:table-cell-properties>
    </style:style>
    <style:style style:name="Tabella9" style:family="table">
      <style:table-properties style:width="8.25cm" table:align="margins" fo:background-color="transparent">
        <style:background-image/>
      </style:table-properties>
    </style:style>
    <style:style style:name="Tabella9.A" style:family="table-column">
      <style:table-column-properties style:column-width="8.25cm" style:rel-column-width="65535*"/>
    </style:style>
    <style:style style:name="Tabella9.1" style:family="table-row">
      <style:table-row-properties fo:background-color="transparent">
        <style:background-image/>
      </style:table-row-properties>
    </style:style>
    <style:style style:name="Tabella9.A1" style:family="table-cell">
      <style:table-cell-properties fo:background-color="#ffd8ce" fo:padding="0.097cm" fo:border="0.05pt solid #000000">
        <style:background-image/>
      </style:table-cell-properties>
    </style:style>
    <style:style style:name="Tabella10" style:family="table">
      <style:table-properties style:width="8.25cm" table:align="margins" fo:background-color="transparent">
        <style:background-image/>
      </style:table-properties>
    </style:style>
    <style:style style:name="Tabella10.A" style:family="table-column">
      <style:table-column-properties style:column-width="8.25cm" style:rel-column-width="65535*"/>
    </style:style>
    <style:style style:name="Tabella10.1" style:family="table-row">
      <style:table-row-properties fo:background-color="transparent">
        <style:background-image/>
      </style:table-row-properties>
    </style:style>
    <style:style style:name="Tabella10.A1" style:family="table-cell">
      <style:table-cell-properties fo:background-color="#ffd8ce" fo:padding="0.097cm" fo:border="0.05pt solid #000000">
        <style:background-image/>
      </style:table-cell-properties>
    </style:style>
    <style:style style:name="Tabella11" style:family="table">
      <style:table-properties style:width="8.25cm" table:align="margins" fo:background-color="transparent">
        <style:background-image/>
      </style:table-properties>
    </style:style>
    <style:style style:name="Tabella11.A" style:family="table-column">
      <style:table-column-properties style:column-width="8.25cm" style:rel-column-width="65535*"/>
    </style:style>
    <style:style style:name="Tabella11.1" style:family="table-row">
      <style:table-row-properties fo:background-color="transparent">
        <style:background-image/>
      </style:table-row-properties>
    </style:style>
    <style:style style:name="Tabella11.A1" style:family="table-cell">
      <style:table-cell-properties fo:background-color="#ffd8ce" fo:padding="0.097cm" fo:border="0.05pt solid #000000">
        <style:background-image/>
      </style:table-cell-properties>
    </style:style>
    <style:style style:name="Tabella12" style:family="table">
      <style:table-properties style:width="8.25cm" table:align="margins" fo:background-color="transparent">
        <style:background-image/>
      </style:table-properties>
    </style:style>
    <style:style style:name="Tabella12.A" style:family="table-column">
      <style:table-column-properties style:column-width="8.25cm" style:rel-column-width="65535*"/>
    </style:style>
    <style:style style:name="Tabella12.1" style:family="table-row">
      <style:table-row-properties fo:background-color="transparent">
        <style:background-image/>
      </style:table-row-properties>
    </style:style>
    <style:style style:name="Tabella12.A1" style:family="table-cell">
      <style:table-cell-properties fo:background-color="#ffd8ce" fo:padding="0.097cm" fo:border="0.05pt solid #000000">
        <style:background-image/>
      </style:table-cell-properties>
    </style:style>
    <style:style style:name="Tabella13" style:family="table">
      <style:table-properties style:width="8.25cm" table:align="margins" fo:background-color="transparent">
        <style:background-image/>
      </style:table-properties>
    </style:style>
    <style:style style:name="Tabella13.A" style:family="table-column">
      <style:table-column-properties style:column-width="8.25cm" style:rel-column-width="65535*"/>
    </style:style>
    <style:style style:name="Tabella13.1" style:family="table-row">
      <style:table-row-properties fo:background-color="transparent">
        <style:background-image/>
      </style:table-row-properties>
    </style:style>
    <style:style style:name="Tabella13.A1" style:family="table-cell">
      <style:table-cell-properties fo:background-color="#ffd8ce" fo:padding="0.097cm" fo:border="0.05pt solid #000000">
        <style:background-image/>
      </style:table-cell-properties>
    </style:style>
    <style:style style:name="Tabella14" style:family="table">
      <style:table-properties style:width="8.25cm" table:align="margins" fo:background-color="transparent">
        <style:background-image/>
      </style:table-properties>
    </style:style>
    <style:style style:name="Tabella14.A" style:family="table-column">
      <style:table-column-properties style:column-width="8.25cm" style:rel-column-width="65535*"/>
    </style:style>
    <style:style style:name="Tabella14.1" style:family="table-row">
      <style:table-row-properties fo:background-color="transparent">
        <style:background-image/>
      </style:table-row-properties>
    </style:style>
    <style:style style:name="Tabella14.A1" style:family="table-cell">
      <style:table-cell-properties fo:background-color="#ffd8ce" fo:padding="0.097cm" fo:border="0.05pt solid #000000">
        <style:background-image/>
      </style:table-cell-properties>
    </style:style>
    <style:style style:name="Tabella15" style:family="table">
      <style:table-properties style:width="8.25cm" table:align="margins" fo:background-color="transparent">
        <style:background-image/>
      </style:table-properties>
    </style:style>
    <style:style style:name="Tabella15.A" style:family="table-column">
      <style:table-column-properties style:column-width="8.25cm" style:rel-column-width="65535*"/>
    </style:style>
    <style:style style:name="Tabella15.1" style:family="table-row">
      <style:table-row-properties fo:background-color="transparent">
        <style:background-image/>
      </style:table-row-properties>
    </style:style>
    <style:style style:name="Tabella15.A1" style:family="table-cell">
      <style:table-cell-properties fo:background-color="#ffd8ce" fo:padding="0.097cm" fo:border="0.05pt solid #000000">
        <style:background-image/>
      </style:table-cell-properties>
    </style:style>
    <style:style style:name="Tabella16" style:family="table">
      <style:table-properties style:width="8.25cm" table:align="margins"/>
    </style:style>
    <style:style style:name="Tabella16.A" style:family="table-column">
      <style:table-column-properties style:column-width="8.25cm" style:rel-column-width="65535*"/>
    </style:style>
    <style:style style:name="Tabella16.1" style:family="table-row">
      <style:table-row-properties fo:background-color="transparent">
        <style:background-image/>
      </style:table-row-properties>
    </style:style>
    <style:style style:name="Tabella16.A1" style:family="table-cell">
      <style:table-cell-properties fo:padding="0.097cm" fo:border="0.05pt solid #000000"/>
    </style:style>
    <style:style style:name="Tabella17" style:family="table">
      <style:table-properties style:width="8.25cm" table:align="margins" fo:background-color="transparent">
        <style:background-image/>
      </style:table-properties>
    </style:style>
    <style:style style:name="Tabella17.A" style:family="table-column">
      <style:table-column-properties style:column-width="8.25cm" style:rel-column-width="65535*"/>
    </style:style>
    <style:style style:name="Tabella17.1" style:family="table-row">
      <style:table-row-properties fo:background-color="transparent">
        <style:background-image/>
      </style:table-row-properties>
    </style:style>
    <style:style style:name="Tabella17.A1" style:family="table-cell">
      <style:table-cell-properties fo:background-color="#ffd8ce" fo:padding="0.097cm" fo:border="0.05pt solid #000000">
        <style:background-image/>
      </style:table-cell-properties>
    </style:style>
    <style:style style:name="Tabella18" style:family="table">
      <style:table-properties style:width="8.25cm" table:align="margins" fo:background-color="transparent">
        <style:background-image/>
      </style:table-properties>
    </style:style>
    <style:style style:name="Tabella18.A" style:family="table-column">
      <style:table-column-properties style:column-width="8.25cm" style:rel-column-width="65535*"/>
    </style:style>
    <style:style style:name="Tabella18.1" style:family="table-row">
      <style:table-row-properties fo:background-color="transparent">
        <style:background-image/>
      </style:table-row-properties>
    </style:style>
    <style:style style:name="Tabella18.A1" style:family="table-cell">
      <style:table-cell-properties fo:background-color="#ffd8ce" fo:padding="0.097cm" fo:border="0.05pt solid #000000">
        <style:background-image/>
      </style:table-cell-properties>
    </style:style>
    <style:style style:name="Tabella19" style:family="table">
      <style:table-properties style:width="8.25cm" table:align="margins" fo:background-color="transparent">
        <style:background-image/>
      </style:table-properties>
    </style:style>
    <style:style style:name="Tabella19.A" style:family="table-column">
      <style:table-column-properties style:column-width="8.25cm" style:rel-column-width="65535*"/>
    </style:style>
    <style:style style:name="Tabella19.1" style:family="table-row">
      <style:table-row-properties fo:background-color="transparent">
        <style:background-image/>
      </style:table-row-properties>
    </style:style>
    <style:style style:name="Tabella19.A1" style:family="table-cell">
      <style:table-cell-properties fo:background-color="#ffd8ce" fo:padding="0.097cm" fo:border="0.05pt solid #000000">
        <style:background-image/>
      </style:table-cell-properties>
    </style:style>
    <style:style style:name="Tabella20" style:family="table">
      <style:table-properties style:width="8.25cm" table:align="margins" fo:background-color="transparent">
        <style:background-image/>
      </style:table-properties>
    </style:style>
    <style:style style:name="Tabella20.A" style:family="table-column">
      <style:table-column-properties style:column-width="8.25cm" style:rel-column-width="65535*"/>
    </style:style>
    <style:style style:name="Tabella20.1" style:family="table-row">
      <style:table-row-properties fo:background-color="transparent">
        <style:background-image/>
      </style:table-row-properties>
    </style:style>
    <style:style style:name="Tabella20.A1" style:family="table-cell">
      <style:table-cell-properties fo:background-color="#ffd8ce" fo:padding="0.097cm" fo:border="0.05pt solid #000000">
        <style:background-image/>
      </style:table-cell-properties>
    </style:style>
    <style:style style:name="P1" style:family="paragraph" style:parent-style-name="Standard">
      <style:paragraph-properties fo:text-align="justify" style:justify-single-word="false"/>
      <style:text-properties style:font-name="Seshat" officeooo:paragraph-rsid="00128921"/>
    </style:style>
    <style:style style:name="P2" style:family="paragraph" style:parent-style-name="Standard">
      <style:paragraph-properties fo:text-align="justify" style:justify-single-word="false"/>
      <style:text-properties style:font-name="Seshat" fo:font-size="8pt" officeooo:paragraph-rsid="001513d1" style:font-size-asian="8pt" style:font-size-complex="8pt"/>
    </style:style>
    <style:style style:name="P3" style:family="paragraph" style:parent-style-name="Standard">
      <style:paragraph-properties fo:text-align="center" style:justify-single-word="false"/>
      <style:text-properties style:font-name="Seshat" officeooo:paragraph-rsid="00128921"/>
    </style:style>
    <style:style style:name="P4" style:family="paragraph" style:parent-style-name="Standard">
      <style:paragraph-properties fo:text-align="justify" style:justify-single-word="false"/>
      <style:text-properties style:font-name="Ferrum" fo:font-size="14pt" officeooo:paragraph-rsid="00128921" style:font-size-asian="14pt" style:font-size-complex="14pt"/>
    </style:style>
    <style:style style:name="P5" style:family="paragraph" style:parent-style-name="Standard">
      <style:paragraph-properties fo:text-align="justify" style:justify-single-word="false" fo:break-before="page"/>
      <style:text-properties style:font-name="Ferrum" fo:font-size="14pt" style:font-size-asian="14pt" style:font-size-complex="14pt"/>
    </style:style>
    <style:style style:name="P6" style:family="paragraph" style:parent-style-name="Standard">
      <style:paragraph-properties fo:text-align="justify" style:justify-single-word="false"/>
      <style:text-properties style:font-name="Ferrum" fo:font-size="14pt" officeooo:paragraph-rsid="00128921" style:font-size-asian="14pt" style:font-size-complex="14pt"/>
    </style:style>
    <style:style style:name="P7" style:family="paragraph" style:parent-style-name="Standard">
      <style:paragraph-properties fo:text-align="justify" style:justify-single-word="false"/>
      <style:text-properties officeooo:paragraph-rsid="00128921"/>
    </style:style>
    <style:style style:name="T1" style:family="text">
      <style:text-properties fo:font-weight="bold" style:font-weight-asian="bold" style:font-weight-complex="bold"/>
    </style:style>
    <style:style style:name="T2" style:family="text">
      <style:text-properties style:font-name="Seshat"/>
    </style:style>
    <style:style style:name="T3" style:family="text">
      <style:text-properties style:font-name="Seshat"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2" fo:column-gap="0.501cm">
          <style:column style:rel-width="32767*" fo:start-indent="0cm" fo:end-indent="0.25cm"/>
          <style:column style:rel-width="32768*" fo:start-indent="0.2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zione1">
        <text:p text:style-name="P1"><draw:frame draw:style-name="fr2" draw:name="UUID1" text:anchor-type="char" svg:width="8.25cm" svg:height="4.288cm" draw:z-index="44"><draw:image xlink:href="Pictures/10000001000007D00000041014B1EBE9F7F96EAC.png" xlink:type="simple" xlink:show="embed" xlink:actuate="onLoad" draw:mime-type="image/png"/></draw:frame></text:p>
        <text:p text:style-name="P3">Game version: 0.1b - Manual version: 0.1b</text:p>
        <table:table table:name="Tabella2" table:style-name="Tabella2">
          <table:table-column table:style-name="Tabella2.A"/>
          <table:table-row table:style-name="Tabella2.1">
            <table:table-cell table:style-name="Tabella2.A1" office:value-type="string">
              <text:p text:style-name="P2">You can find an updated digital version of this manual and more information about Mazes of Stampadia 3D at https://www.kesiev.com/stampadia-mazes/learn.html</text:p>
            </table:table-cell>
          </table:table-row>
        </table:table>
        <text:p text:style-name="Standard"/>
        <text:p text:style-name="P4">In the darkest depths of Stampadia...</text:p>
        <text:p text:style-name="Standard"/>
        <text:p text:style-name="P1">The Stampadia kingdom's oldest stories tell of a powerful artifact, stolen from the dungeons again and again by valiant Heroes.</text:p>
        <text:p text:style-name="Standard"/>
        <text:p text:style-name="P1">Or at least, that's what we've managed to figure out. This time, we're as confused as you are.</text:p>
        <text:p text:style-name="Standard"/>
        <text:p text:style-name="P1"><draw:frame draw:style-name="fr2" draw:name="UUID2" text:anchor-type="char" svg:width="8.25cm" svg:height="4.288cm" draw:z-index="3"><draw:image xlink:href="Pictures/10000001000007D000000410CA6A3FB55CCB3150.png" xlink:type="simple" xlink:show="embed" xlink:actuate="onLoad" draw:mime-type="image/png"/></draw:frame></text:p>
        <text:p text:style-name="P1">We found a large stock of boxes containing unlabeled floppy disks. Each contains a <text:span text:style-name="T1">single .Y file</text:span> that, in our opinion, stores a digital copy of an Ancient Stampadian's memory fragments: scattered images and moments of their attempted escape from the bowels of the earth, experienced through their own eyes.</text:p>
        <text:p text:style-name="Standard"/>
        <text:p text:style-name="P1">Even these floppy disks seem imbued with Stampadia's strange magic: the reader can relive them firsthand with a token, some dice, and a pencil. But, this time, maybe with something else...</text:p>
        <text:p text:style-name="Standard"/>
        <text:p text:style-name="P1">We apologize. Since these are memories and not written texts, we were unable to identify all the rules and the materials needed to play them and to create a reliable translator. We will provide you with the information exactly as we found it, and we'll share everything we've discovered so far.</text:p>
        <text:p text:style-name="Standard"/>
        <text:p text:style-name="P1">We will share one of these Memory Dumps daily at https://www.kesiev.com/stampadia-mazes/. Good luck!</text:p>
        <text:p text:style-name="Standard"/>
        <table:table table:name="Tabella1" table:style-name="Tabella1">
          <table:table-column table:style-name="Tabella1.A"/>
          <table:table-row table:style-name="Tabella1.1">
            <table:table-cell table:style-name="Tabella1.A1" office:value-type="string">
              <text:p text:style-name="P1">From time to time, we will report in these boxes some of the notes we have collected during the preliminary studies of the disks data.</text:p>
            </table:table-cell>
          </table:table-row>
        </table:table>
        <text:p text:style-name="Standard"/>
        <text:p text:style-name="P4">Setting up the Brain</text:p>
        <text:p text:style-name="Standard"/>
        <text:p text:style-name="P1">To play a <text:span text:style-name="T1">Memory Dump</text:span>, you need 5 6-sided dice, a small token, a pencil, and an eraser. You may need other supplies, but we can't say for sure. We suggest you keep your smartphone and scissors handy, just to be safe.</text:p>
        <text:p text:style-name="Standard"/>
        <text:p text:style-name="P1"><draw:frame draw:style-name="fr2" draw:name="UUID3" text:anchor-type="char" svg:width="8.25cm" svg:height="4.288cm" draw:z-index="4"><draw:image xlink:href="Pictures/10000001000007D0000004104C56FC570F3CA430.png" xlink:type="simple" xlink:show="embed" xlink:actuate="onLoad" draw:mime-type="image/png"/></draw:frame></text:p>
        <text:p text:style-name="P1">Download the daily Memory Dump PDF, print it, and cut all of the cards on the first 2 pages - there usually are 18 of them.</text:p>
        <text:p text:style-name="Standard"/>
        <table:table table:name="Tabella3" table:style-name="Tabella3">
          <table:table-column table:style-name="Tabella3.A"/>
          <table:table-row table:style-name="Tabella3.1">
            <table:table-cell table:style-name="Tabella3.A1" office:value-type="string">
              <text:p text:style-name="P1">If you prefer a more guided approach for your first adventure, we've prepared a <text:span text:style-name="T1">tutorial dungeon</text:span> for you to print, cut, and play. You can find it at <text:span text:style-name="T1">kesiev.com/stampadia-mazes/learn.html</text:span>. Start reading the <text:span text:style-name="T1">Welcome!</text:span> card and keep this manual aside. It will help you learn the basics of the game as you venture through your first maze!</text:p>
            </table:table-cell>
          </table:table-row>
        </table:table>
        <text:p text:style-name="Standard"/>
        <text:p text:style-name="P1"><text:span text:style-name="T1">Cut the cards outlines only</text:span>. Keep the <draw:frame draw:style-name="fr1" draw:name="UUID4" text:anchor-type="as-char" svg:width="0.411cm" svg:height="0.411cm" draw:z-index="6"><draw:image xlink:href="Pictures/1000000100000064000000649F6C487DED0FB695.png" xlink:type="simple" xlink:show="embed" xlink:actuate="onLoad" draw:mime-type="image/png"/></draw:frame><text:s/>cards set face-up, and the others face-down in a pile <draw:frame draw:style-name="fr1" draw:name="UUID5" text:anchor-type="as-char" svg:width="0.411cm" svg:height="0.411cm" draw:z-index="7"><draw:image xlink:href="Pictures/10000001000000640000006436DE474D9C193B3D.png" xlink:type="simple" xlink:show="embed" xlink:actuate="onLoad" draw:mime-type="image/png"/></draw:frame><text:s/>to form the <text:span text:style-name="T1">Forgotten Deck</text:span>.</text:p>
        <text:p text:style-name="P1">Then, lay out the dark border cards (numbered from 10 and up) face-up in numerical order and in a grid on your right side <draw:frame draw:style-name="fr1" draw:name="UUID6" text:anchor-type="as-char" svg:width="0.411cm" svg:height="0.411cm" draw:z-index="8"><draw:image xlink:href="Pictures/100000010000006400000064593EF5D0ABAB03F5.png" xlink:type="simple" xlink:show="embed" xlink:actuate="onLoad" draw:mime-type="image/png"/></draw:frame><text:s/>to form the <text:span text:style-name="T1">Long Term Area</text:span>, and the remaining cards face-up in a line near the grid <draw:frame draw:style-name="fr1" draw:name="UUID7" text:anchor-type="as-char" svg:width="0.411cm" svg:height="0.411cm" draw:z-index="9"><draw:image xlink:href="Pictures/10000001000000640000006448F9F31E2308037E.png" xlink:type="simple" xlink:show="embed" xlink:actuate="onLoad" draw:mime-type="image/png"/></draw:frame><text:s/>to form the <text:span text:style-name="T1">Short Term Area</text:span>.</text:p>
        <text:p text:style-name="P1"><text:soft-page-break/>Take the <draw:frame draw:style-name="fr1" draw:name="UUID8" text:anchor-type="as-char" svg:width="0.411cm" svg:height="0.411cm" draw:z-index="10"><draw:image xlink:href="Pictures/100000010000006400000064CC2FAEFDF79FD61B.png" xlink:type="simple" xlink:show="embed" xlink:actuate="onLoad" draw:mime-type="image/png"/></draw:frame><draw:frame draw:style-name="fr1" draw:name="UUID9" text:anchor-type="as-char" svg:width="0.411cm" svg:height="0.411cm" draw:z-index="11"><draw:image xlink:href="Pictures/1000000100000064000000649F6C487DED0FB695.png" xlink:type="simple" xlink:show="embed" xlink:actuate="onLoad" draw:mime-type="image/png"/></draw:frame><text:s/>card from the line and <text:span text:style-name="T1">arrange</text:span> it in front of you <draw:frame draw:style-name="fr1" draw:name="UUID10" text:anchor-type="as-char" svg:width="0.411cm" svg:height="0.411cm" draw:z-index="13"><draw:image xlink:href="Pictures/1000000100000064000000647F111E6C6588B849.png" xlink:type="simple" xlink:show="embed" xlink:actuate="onLoad" draw:mime-type="image/png"/></draw:frame>. Leave some empty spaces around this card, forming a Y <draw:frame draw:style-name="fr1" draw:name="UUID11" text:anchor-type="as-char" svg:width="0.411cm" svg:height="0.411cm" draw:z-index="14"><draw:image xlink:href="Pictures/100000010000006400000064B811DB04FA0728B6.png" xlink:type="simple" xlink:show="embed" xlink:actuate="onLoad" draw:mime-type="image/png"/></draw:frame>. This is the <text:span text:style-name="T1">Sight Area</text:span>.</text:p>
        <text:p text:style-name="P1">Finally, leave one card space on the bottom left of the Y: this will host the <text:span text:style-name="T1">Hippocampus Area</text:span> <draw:frame draw:style-name="fr1" draw:name="UUID12" text:anchor-type="as-char" svg:width="0.411cm" svg:height="0.411cm" draw:z-index="15"><draw:image xlink:href="Pictures/1000000100000064000000641488C0188597186B.png" xlink:type="simple" xlink:show="embed" xlink:actuate="onLoad" draw:mime-type="image/png"/></draw:frame>.</text:p>
        <text:p text:style-name="Standard"/>
        <text:p text:style-name="P1"><draw:frame draw:style-name="fr2" draw:name="UUID13" text:anchor-type="char" svg:width="8.25cm" svg:height="4.288cm" draw:z-index="5"><draw:image xlink:href="Pictures/10000001000007D000000410819B36F60A2BE987.png" xlink:type="simple" xlink:show="embed" xlink:actuate="onLoad" draw:mime-type="image/png"/></draw:frame></text:p>
        <text:p text:style-name="P1">Cut the third page along the dashed line to create the <text:span text:style-name="T1">Map Sheet</text:span> and the <text:span text:style-name="T1">Character Sheet</text:span>. Place the Map Sheet on your left side <text:span text:style-name="T1">pointing North</text:span>. Place the Character Sheet right under the Sight Area and tick 6 <draw:frame draw:style-name="fr1" draw:name="UUID14" text:anchor-type="as-char" svg:width="0.411cm" svg:height="0.411cm" draw:z-index="18"><draw:image xlink:href="Pictures/10000001000000640000006445BD65E4E0981768.png" xlink:type="simple" xlink:show="embed" xlink:actuate="onLoad" draw:mime-type="image/png"/></draw:frame>, 1 <draw:frame draw:style-name="fr1" draw:name="UUID15" text:anchor-type="as-char" svg:width="0.411cm" svg:height="0.411cm" draw:z-index="19"><draw:image xlink:href="Pictures/1000000100000064000000647BE45AD0E8618197.png" xlink:type="simple" xlink:show="embed" xlink:actuate="onLoad" draw:mime-type="image/png"/></draw:frame>, and 1 <draw:frame draw:style-name="fr1" draw:name="UUID16" text:anchor-type="as-char" svg:width="0.411cm" svg:height="0.411cm" draw:z-index="20"><draw:image xlink:href="Pictures/1000000100000064000000648813B6AC09DB83E9.png" xlink:type="simple" xlink:show="embed" xlink:actuate="onLoad" draw:mime-type="image/png"/></draw:frame>.</text:p>
        <text:p text:style-name="P1">The Stampadian brain is now initialized. We're ready to go!</text:p>
        <text:p text:style-name="Standard"/>
        <table:table table:name="Tabella4" table:style-name="Tabella4">
          <table:table-column table:style-name="Tabella4.A"/>
          <table:table-row table:style-name="Tabella4.1">
            <table:table-cell table:style-name="Tabella4.A1" office:value-type="string">
              <text:p text:style-name="P1">The original files contained in the floppy disks <text:span text:style-name="T1">have the .Y extension</text:span>, and we are confident that <text:span text:style-name="T1">this suggests the Sight Area and Hippocampus Area layout</text:span>. That said, we're not sure about the layout of the other game elements. The one we've suggested is what we've found most effective during our experiments, but feel free to move the materials wherever you see fit.</text:p>
            </table:table-cell>
          </table:table-row>
        </table:table>
        <text:p text:style-name="Standard"/>
        <text:p text:style-name="P4">The Sight Area</text:p>
        <text:p text:style-name="Standard"/>
        <text:p text:style-name="P1">The Stampadian dungeons are divided into a grid of <text:span text:style-name="T1">cells</text:span>, each one identified by a single letter name and surrounded by one or more walls.</text:p>
        <text:p text:style-name="P1">Every Ancient Stampadian will start in a dead end on <text:span text:style-name="T1">cell A</text:span> (<draw:frame draw:style-name="fr1" draw:name="UUID17" text:anchor-type="as-char" svg:width="0.411cm" svg:height="0.411cm" draw:z-index="21"><draw:image xlink:href="Pictures/10000001000000640000006405058DC98882AF6D.png" xlink:type="simple" xlink:show="embed" xlink:actuate="onLoad" draw:mime-type="image/png"/></draw:frame>) and <text:span text:style-name="T1">facing North</text:span>. This dead end is already marked in the center of the map, with <text:span text:style-name="T1">an A letter surrounded by walls</text:span>.</text:p>
        <text:p text:style-name="P1">If you're sitting down <text:span text:style-name="T1">right in front of the Sight Area</text:span>, you're already seeing <text:span text:style-name="T1">what the Ancient Stampadian sees right now</text:span>. Yes, you're going to explore the dungeon <text:span text:style-name="T1">from their very eyes</text:span>.</text:p>
        <text:p text:style-name="Standard"/>
        <text:p text:style-name="P1"><draw:frame draw:style-name="fr2" draw:name="UUID18" text:anchor-type="char" svg:width="8.25cm" svg:height="4.288cm" draw:z-index="16"><draw:image xlink:href="Pictures/10000001000007D0000004109EE6AEDD4DBB224F.png" xlink:type="simple" xlink:show="embed" xlink:actuate="onLoad" draw:mime-type="image/png"/></draw:frame></text:p>
        <text:p text:style-name="P1">The <draw:frame draw:style-name="fr1" draw:name="UUID19" text:anchor-type="as-char" svg:width="0.411cm" svg:height="0.411cm" draw:z-index="24"><draw:image xlink:href="Pictures/100000010000006400000064CC2FAEFDF79FD61B.png" xlink:type="simple" xlink:show="embed" xlink:actuate="onLoad" draw:mime-type="image/png"/></draw:frame><draw:frame draw:style-name="fr1" draw:name="UUID20" text:anchor-type="as-char" svg:width="0.411cm" svg:height="0.411cm" draw:z-index="0"><draw:image xlink:href="Pictures/1000000100000064000000649F6C487DED0FB695.png" xlink:type="simple" xlink:show="embed" xlink:actuate="onLoad" draw:mime-type="image/png"/></draw:frame><text:s/>card in front of you is showing <text:span text:style-name="T1">your first corridor</text:span> <draw:frame draw:style-name="fr1" draw:name="UUID21" text:anchor-type="as-char" svg:width="0.411cm" svg:height="0.411cm" draw:z-index="26"><draw:image xlink:href="Pictures/10000001000000640000006436DE474D9C193B3D.png" xlink:type="simple" xlink:show="embed" xlink:actuate="onLoad" draw:mime-type="image/png"/></draw:frame>.</text:p>
        <text:p text:style-name="P1"><text:span text:style-name="T1">Tilting your head to the right</text:span>, you will see <text:span text:style-name="T1">an empty space</text:span> <draw:frame draw:style-name="fr1" draw:name="UUID22" text:anchor-type="as-char" svg:width="0.411cm" svg:height="0.411cm" draw:z-index="27"><draw:image xlink:href="Pictures/100000010000006400000064593EF5D0ABAB03F5.png" xlink:type="simple" xlink:show="embed" xlink:actuate="onLoad" draw:mime-type="image/png"/></draw:frame>: the Ancient Stampadian <text:span text:style-name="T1">have no meaningful memory of that place</text:span>, so we assume <text:span text:style-name="T1">it was a plain wall</text:span>. You can do the same, tilting your head left to see the wall on the other side.</text:p>
        <text:p text:style-name="P1"><text:span text:style-name="T1">Tilting your head down</text:span>, you will <text:span text:style-name="T1">look behind you</text:span> to see a third wall <draw:frame draw:style-name="fr1" draw:name="UUID23" text:anchor-type="as-char" svg:width="0.411cm" svg:height="0.411cm" draw:z-index="28"><draw:image xlink:href="Pictures/10000001000000640000006448F9F31E2308037E.png" xlink:type="simple" xlink:show="embed" xlink:actuate="onLoad" draw:mime-type="image/png"/></draw:frame>.</text:p>
        <text:p text:style-name="P1">So, every time you start a new exploration, you will be <text:span text:style-name="T1">surrounded by walls</text:span> except for the North, in which there is <text:span text:style-name="T1">a corridor diving into the dark</text:span>...</text:p>
        <text:p text:style-name="Standard"/>
        <text:p text:style-name="P4">Activating a card</text:p>
        <text:p text:style-name="Standard"/>
        <text:p text:style-name="P1">The top half of each card shows what you can see in a given direction. In the bottom center, there may be a round-shaped <draw:frame draw:style-name="fr1" draw:name="UUID24" text:anchor-type="as-char" svg:width="0.674cm" svg:height="0.411cm" draw:z-index="29"><draw:image xlink:href="Pictures/10000001000000A40000006486E0E11AC61FE69C.png" xlink:type="simple" xlink:show="embed" xlink:actuate="onLoad" draw:mime-type="image/png"/></draw:frame><text:s/>or a star-shaped <draw:frame draw:style-name="fr1" draw:name="UUID25" text:anchor-type="as-char" svg:width="0.674cm" svg:height="0.411cm" draw:z-index="30"><draw:image xlink:href="Pictures/10000001000000A400000064105341F3A17CE00B.png" xlink:type="simple" xlink:show="embed" xlink:actuate="onLoad" draw:mime-type="image/png"/></draw:frame><text:s/>tab that may contain an icon.</text:p>
        <text:p text:style-name="Standard"/>
        <text:p text:style-name="P1"><draw:frame draw:style-name="fr2" draw:name="UUID26" text:anchor-type="char" svg:width="8.25cm" svg:height="4.288cm" draw:z-index="22"><draw:image xlink:href="Pictures/10000001000007D00000041006FDE945B446C44D.png" xlink:type="simple" xlink:show="embed" xlink:actuate="onLoad" draw:mime-type="image/png"/></draw:frame></text:p>
        <text:p text:style-name="P1">You can activate any round-shaped or star-shaped tab card <text:span text:style-name="T1">with an icon in it</text:span> <draw:frame draw:style-name="fr1" draw:name="UUID27" text:anchor-type="as-char" svg:width="0.411cm" svg:height="0.411cm" draw:z-index="32"><draw:image xlink:href="Pictures/10000001000000640000006436DE474D9C193B3D.png" xlink:type="simple" xlink:show="embed" xlink:actuate="onLoad" draw:mime-type="image/png"/></draw:frame>. The icon represents <text:span text:style-name="T1">the type of action you are going to perform</text:span>: <draw:frame draw:style-name="fr1" draw:name="UUID28" text:anchor-type="as-char" svg:width="0.411cm" svg:height="0.411cm" draw:z-index="33"><draw:image xlink:href="Pictures/1000000100000064000000646B7D824BAC4ED5C6.png" xlink:type="simple" xlink:show="embed" xlink:actuate="onLoad" draw:mime-type="image/png"/></draw:frame><text:s/>Move action, <draw:frame draw:style-name="fr1" draw:name="UUID29" text:anchor-type="as-char" svg:width="0.411cm" svg:height="0.411cm" draw:z-index="34"><draw:image xlink:href="Pictures/100000010000006400000064A99A9627F106C218.png" xlink:type="simple" xlink:show="embed" xlink:actuate="onLoad" draw:mime-type="image/png"/></draw:frame><text:s/>Talk action, <draw:frame draw:style-name="fr1" draw:name="UUID30" text:anchor-type="as-char" svg:width="0.411cm" svg:height="0.411cm" draw:z-index="35"><draw:image xlink:href="Pictures/100000010000006400000064D132A40BCADF3785.png" xlink:type="simple" xlink:show="embed" xlink:actuate="onLoad" draw:mime-type="image/png"/></draw:frame><text:s/>Use action, etc. If you wish to perform it, follow the instructions on the bottom half of the card.</text:p>
        <text:p text:style-name="P1">Cards with a star-shaped tab <draw:frame draw:style-name="fr1" draw:name="UUID31" text:anchor-type="as-char" svg:width="0.411cm" svg:height="0.411cm" draw:z-index="37"><draw:image xlink:href="Pictures/100000010000006400000064593EF5D0ABAB03F5.png" xlink:type="simple" xlink:show="embed" xlink:actuate="onLoad" draw:mime-type="image/png"/></draw:frame><text:s/><text:span text:style-name="T1">automatically activate one by one in any order right after you've arranged them in the Sight Area</text:span>.</text:p>
        <text:p text:style-name="P1">Cards with no space and an icon <draw:frame draw:style-name="fr1" draw:name="UUID32" text:anchor-type="as-char" svg:width="0.411cm" svg:height="0.411cm" draw:z-index="39"><draw:image xlink:href="Pictures/10000001000000640000006448F9F31E2308037E.png" xlink:type="simple" xlink:show="embed" xlink:actuate="onLoad" draw:mime-type="image/png"/></draw:frame><text:s/>don't provide any interaction, and they act like walls.</text:p>
        <text:p text:style-name="P7"><text:soft-page-break/><text:span text:style-name="T2">Cards activate one after another, so you can't choose to activate a card if an activation is already in progress or a card is waiting to be activated. (For example, in the case of multiple star-shaped tab cards.)</text:span></text:p>
        <text:p text:style-name="Standard"/>
        <table:table table:name="Tabella5" table:style-name="Tabella5">
          <table:table-column table:style-name="Tabella5.A"/>
          <table:table-row table:style-name="Tabella5.1">
            <table:table-cell table:style-name="Tabella5.A1" office:value-type="string">
              <text:p text:style-name="P1">While these are the 3 most common types, during our analysis, we encountered several other combinations of symbols and tabs on the cards.</text:p>
            </table:table-cell>
          </table:table-row>
        </table:table>
        <text:p text:style-name="Standard"/>
        <text:p text:style-name="P1">The <draw:frame draw:style-name="fr1" draw:name="UUID33" text:anchor-type="as-char" svg:width="0.411cm" svg:height="0.411cm" draw:z-index="40"><draw:image xlink:href="Pictures/100000010000006400000064CC2FAEFDF79FD61B.png" xlink:type="simple" xlink:show="embed" xlink:actuate="onLoad" draw:mime-type="image/png"/></draw:frame><draw:frame draw:style-name="fr1" draw:name="UUID34" text:anchor-type="as-char" svg:width="0.411cm" svg:height="0.411cm" draw:z-index="41"><draw:image xlink:href="Pictures/1000000100000064000000649F6C487DED0FB695.png" xlink:type="simple" xlink:show="embed" xlink:actuate="onLoad" draw:mime-type="image/png"/></draw:frame><text:s/>card always shows a corridor with a <draw:frame draw:style-name="fr1" draw:name="UUID35" text:anchor-type="as-char" svg:width="0.411cm" svg:height="0.411cm" draw:z-index="42"><draw:image xlink:href="Pictures/1000000100000064000000646B7D824BAC4ED5C6.png" xlink:type="simple" xlink:show="embed" xlink:actuate="onLoad" draw:mime-type="image/png"/></draw:frame><text:s/>symbol: this means that you can perform a <draw:frame draw:style-name="fr1" draw:name="UUID36" text:anchor-type="as-char" svg:width="0.411cm" svg:height="0.411cm" draw:z-index="43"><draw:image xlink:href="Pictures/1000000100000064000000646B7D824BAC4ED5C6.png" xlink:type="simple" xlink:show="embed" xlink:actuate="onLoad" draw:mime-type="image/png"/></draw:frame><text:s/><text:span text:style-name="T1">Move action</text:span> on that corridor <text:span text:style-name="T1">facing that direction</text:span>.</text:p>
        <text:p text:style-name="Standard"/>
        <text:p text:style-name="P4">Conditions and Effects</text:p>
        <text:p text:style-name="Standard"/>
        <text:p text:style-name="P1"><draw:frame draw:style-name="fr2" draw:name="UUID37" text:anchor-type="char" svg:width="8.25cm" svg:height="4.288cm" draw:z-index="31"><draw:image xlink:href="Pictures/10000001000007D00000041025E34A828F9F6765.png" xlink:type="simple" xlink:show="embed" xlink:actuate="onLoad" draw:mime-type="image/png"/></draw:frame></text:p>
        <text:p text:style-name="P1">Although there are different types of cards, they are all activated the same way: <text:span text:style-name="T1">reading, evaluating, and executing each line</text:span>, starting from top to bottom <draw:frame draw:style-name="fr1" draw:name="UUID38" text:anchor-type="as-char" svg:width="0.411cm" svg:height="0.411cm" draw:z-index="45"><draw:image xlink:href="Pictures/10000001000000640000006436DE474D9C193B3D.png" xlink:type="simple" xlink:show="embed" xlink:actuate="onLoad" draw:mime-type="image/png"/></draw:frame>, and then the second column after the first <draw:frame draw:style-name="fr1" draw:name="UUID39" text:anchor-type="as-char" svg:width="0.411cm" svg:height="0.411cm" draw:z-index="23"><draw:image xlink:href="Pictures/100000010000006400000064593EF5D0ABAB03F5.png" xlink:type="simple" xlink:show="embed" xlink:actuate="onLoad" draw:mime-type="image/png"/></draw:frame>.</text:p>
        <text:p text:style-name="Standard"/>
        <text:p text:style-name="P1">Lines may include <text:span text:style-name="T1">one or more conditions</text:span> <draw:frame draw:style-name="fr1" draw:name="UUID40" text:anchor-type="as-char" svg:width="0.411cm" svg:height="0.411cm" draw:z-index="46"><draw:image xlink:href="Pictures/10000001000000640000006448F9F31E2308037E.png" xlink:type="simple" xlink:show="embed" xlink:actuate="onLoad" draw:mime-type="image/png"/></draw:frame><text:s/>and always include <text:span text:style-name="T1">one or more effects</text:span> <draw:frame draw:style-name="fr1" draw:name="UUID41" text:anchor-type="as-char" svg:width="0.411cm" svg:height="0.411cm" draw:z-index="47"><draw:image xlink:href="Pictures/1000000100000064000000647F111E6C6588B849.png" xlink:type="simple" xlink:show="embed" xlink:actuate="onLoad" draw:mime-type="image/png"/></draw:frame>. There are 2 kinds of conditions: <text:span text:style-name="T1">mandatory conditions</text:span>, ending with a colon ":", that <text:span text:style-name="T1">always trigger the effect if the condition is fully verified</text:span>, and <text:span text:style-name="T1">optional conditions</text:span>, ending with a question mark "?", that trigger the effect when the condition is fully verified <text:span text:style-name="T1">and if you wish to perform that</text:span>. If no condition is described, the effect <text:span text:style-name="T1">is always triggered</text:span>.</text:p>
        <text:p text:style-name="Standard"/>
        <text:p text:style-name="P1">In the <draw:frame draw:style-name="fr1" draw:name="UUID42" text:anchor-type="as-char" svg:width="0.411cm" svg:height="0.411cm" draw:z-index="48"><draw:image xlink:href="Pictures/100000010000006400000064CC2FAEFDF79FD61B.png" xlink:type="simple" xlink:show="embed" xlink:actuate="onLoad" draw:mime-type="image/png"/></draw:frame><draw:frame draw:style-name="fr1" draw:name="UUID43" text:anchor-type="as-char" svg:width="0.411cm" svg:height="0.411cm" draw:z-index="49"><draw:image xlink:href="Pictures/1000000100000064000000649F6C487DED0FB695.png" xlink:type="simple" xlink:show="embed" xlink:actuate="onLoad" draw:mime-type="image/png"/></draw:frame><text:s/>card (and in most of the Short Term Area cards), there is a list of lines with <text:span text:style-name="T1">mandatory conditions</text:span> that perform different <text:span text:style-name="T1">Move effects</text:span> depending on <text:span text:style-name="T1">the cell you are in</text:span>. Since you are in <draw:frame draw:style-name="fr1" draw:name="UUID44" text:anchor-type="as-char" svg:width="0.411cm" svg:height="0.411cm" draw:z-index="51"><draw:image xlink:href="Pictures/10000001000000640000006405058DC98882AF6D.png" xlink:type="simple" xlink:show="embed" xlink:actuate="onLoad" draw:mime-type="image/png"/></draw:frame>, only the first line of the list is triggered.</text:p>
        <text:p text:style-name="Standard"/>
        <table:table table:name="Tabella6" table:style-name="Tabella6">
          <table:table-column table:style-name="Tabella6.A"/>
          <table:table-row table:style-name="Tabella6.1">
            <table:table-cell table:style-name="Tabella6.A1" office:value-type="string">
              <text:p text:style-name="P1">Both conditions and effects are often expressed solely using symbols. We've encountered dozens of them, some intuitive and others almost indecipherable. Unfortunately, we don't have enough data to explain them all: the most important ones are summarized in the Character Sheet. We believe it is quite clear that the Stampadian loved playing dice...</text:p>
            </table:table-cell>
          </table:table-row>
        </table:table>
        <text:p text:style-name="Standard"/>
        <text:p text:style-name="P4">Move Effects</text:p>
        <text:p text:style-name="Standard"/>
        <table:table table:name="Tabella7" table:style-name="Tabella7">
          <table:table-column table:style-name="Tabella7.A"/>
          <table:table-row table:style-name="Tabella7.1">
            <table:table-cell table:style-name="Tabella7.A1" office:value-type="string">
              <text:p text:style-name="P1">"The hippocampus plays important roles in the consolidation of information from short-term memory to long-term memory, and in spatial memory that enables navigation." - Wikipedia.</text:p>
            </table:table-cell>
          </table:table-row>
        </table:table>
        <text:p text:style-name="Standard"/>
        <text:p text:style-name="P1">The most common action is the <draw:frame draw:style-name="fr1" draw:name="UUID45" text:anchor-type="as-char" svg:width="0.411cm" svg:height="0.411cm" draw:z-index="52"><draw:image xlink:href="Pictures/1000000100000064000000646B7D824BAC4ED5C6.png" xlink:type="simple" xlink:show="embed" xlink:actuate="onLoad" draw:mime-type="image/png"/></draw:frame><text:s/>Move action, which usually triggers a <text:span text:style-name="T1">Move effect</text:span> that lets you walk around the dungeon. As you move, your <text:span text:style-name="T1">current cell</text:span>, your <text:span text:style-name="T1">sight</text:span>, and your <text:span text:style-name="T1">orientation</text:span> may change. Movement effects are described by a <text:span text:style-name="T1">cell name</text:span>, like <draw:frame draw:style-name="fr1" draw:name="UUID46" text:anchor-type="as-char" svg:width="0.411cm" svg:height="0.411cm" draw:z-index="53"><draw:image xlink:href="Pictures/1000000100000064000000647806C8236C15D24F.png" xlink:type="simple" xlink:show="embed" xlink:actuate="onLoad" draw:mime-type="image/png"/></draw:frame>, indicating which cell you will be in, followed by a sequence of 4 circles like <draw:frame draw:style-name="fr1" draw:name="UUID47" text:anchor-type="as-char" svg:width="0.411cm" svg:height="0.473cm" draw:z-index="54"><draw:image xlink:href="Pictures/100000010000006400000073081E32AAC9D1C699.png" xlink:type="simple" xlink:show="embed" xlink:actuate="onLoad" draw:mime-type="image/png"/></draw:frame><draw:frame draw:style-name="fr1" draw:name="UUID48" text:anchor-type="as-char" svg:width="0.411cm" svg:height="0.411cm" draw:z-index="55"><draw:image xlink:href="Pictures/10000001000000640000006431B350D74D276436.png" xlink:type="simple" xlink:show="embed" xlink:actuate="onLoad" draw:mime-type="image/png"/></draw:frame><draw:frame draw:style-name="fr1" draw:name="UUID49" text:anchor-type="as-char" svg:width="0.411cm" svg:height="0.411cm" draw:z-index="56"><draw:image xlink:href="Pictures/100000010000006400000064938FB202B86E4B61.png" xlink:type="simple" xlink:show="embed" xlink:actuate="onLoad" draw:mime-type="image/png"/></draw:frame><draw:frame draw:style-name="fr1" draw:name="UUID50" text:anchor-type="as-char" svg:width="0.411cm" svg:height="0.411cm" draw:z-index="57"><draw:image xlink:href="Pictures/1000000100000064000000645038D412BFE00129.png" xlink:type="simple" xlink:show="embed" xlink:actuate="onLoad" draw:mime-type="image/png"/></draw:frame><text:s/>describing how to update the Sight Area.</text:p>
        <text:p text:style-name="Standard"/>
        <text:p text:style-name="P1"><draw:frame draw:style-name="fr2" draw:name="UUID51" text:anchor-type="char" svg:width="8.25cm" svg:height="4.288cm" draw:z-index="58"><draw:image xlink:href="Pictures/10000001000007D000000410F8F15C433F769109.png" xlink:type="simple" xlink:show="embed" xlink:actuate="onLoad" draw:mime-type="image/png"/></draw:frame></text:p>
        <text:p text:style-name="P1">To perform a Move effect, move the card with the instructions into the Hippocampus Area <draw:frame draw:style-name="fr1" draw:name="UUID52" text:anchor-type="as-char" svg:width="0.411cm" svg:height="0.411cm" draw:z-index="59"><draw:image xlink:href="Pictures/10000001000000640000006436DE474D9C193B3D.png" xlink:type="simple" xlink:show="embed" xlink:actuate="onLoad" draw:mime-type="image/png"/></draw:frame><text:s/>(in your first Move action, it will be the <draw:frame draw:style-name="fr1" draw:name="UUID53" text:anchor-type="as-char" svg:width="0.411cm" svg:height="0.411cm" draw:z-index="60"><draw:image xlink:href="Pictures/100000010000006400000064CC2FAEFDF79FD61B.png" xlink:type="simple" xlink:show="embed" xlink:actuate="onLoad" draw:mime-type="image/png"/></draw:frame><draw:frame draw:style-name="fr1" draw:name="UUID54" text:anchor-type="as-char" svg:width="0.411cm" svg:height="0.411cm" draw:z-index="62"><draw:image xlink:href="Pictures/1000000100000064000000649F6C487DED0FB695.png" xlink:type="simple" xlink:show="embed" xlink:actuate="onLoad" draw:mime-type="image/png"/></draw:frame><text:s/>card), moving the previous one back to the Long Term Area or the Short Term Area if present. Place the small token on the <text:span text:style-name="T1">starting cell name</text:span> <draw:frame draw:style-name="fr1" draw:name="UUID55" text:anchor-type="as-char" svg:width="0.411cm" svg:height="0.411cm" draw:z-index="63"><draw:image xlink:href="Pictures/100000010000006400000064593EF5D0ABAB03F5.png" xlink:type="simple" xlink:show="embed" xlink:actuate="onLoad" draw:mime-type="image/png"/></draw:frame><text:s/>and, from left to right, <text:span text:style-name="T1">arrange</text:span> the Sight Area following the circles <draw:frame draw:style-name="fr1" draw:name="UUID56" text:anchor-type="as-char" svg:width="0.411cm" svg:height="0.411cm" draw:z-index="64"><draw:image xlink:href="Pictures/10000001000000640000006448F9F31E2308037E.png" xlink:type="simple" xlink:show="embed" xlink:actuate="onLoad" draw:mime-type="image/png"/></draw:frame>: first the one in the left slot, the second one in the middle slot, the third one in the right slot, and the fourth one in the bottom slot. Cards with a number in a black circle and a dot <draw:frame draw:style-name="fr1" draw:name="UUID57" text:anchor-type="as-char" svg:width="0.411cm" svg:height="0.473cm" draw:z-index="65"><draw:image xlink:href="Pictures/100000010000006400000073081E32AAC9D1C699.png" xlink:type="simple" xlink:show="embed" xlink:actuate="onLoad" draw:mime-type="image/png"/></draw:frame><text:s/>move back and forth <text:span text:style-name="T1">from the Long Term Area</text:span>, cards with a number in a gray circle <draw:frame draw:style-name="fr1" draw:name="UUID58" text:anchor-type="as-char" svg:width="0.411cm" svg:height="0.411cm" draw:z-index="66"><draw:image xlink:href="Pictures/10000001000000640000006431B350D74D276436.png" xlink:type="simple" xlink:show="embed" xlink:actuate="onLoad" draw:mime-type="image/png"/></draw:frame><text:s/>move back and forth <text:span text:style-name="T1">from the Short Term Area</text:span>, and empty circles <draw:frame draw:style-name="fr1" draw:name="UUID59" text:anchor-type="as-char" svg:width="0.411cm" svg:height="0.411cm" draw:z-index="67"><draw:image xlink:href="Pictures/100000010000006400000064938FB202B86E4B61.png" xlink:type="simple" xlink:show="embed" xlink:actuate="onLoad" draw:mime-type="image/png"/></draw:frame><text:s/>indicate an <text:span text:style-name="T1">empty space</text:span>. Cards may come from <text:span text:style-name="T1">any</text:span> area, including the Sight Area, but <text:span text:style-name="T1">never from the Forgotten Deck</text:span>.</text:p>
        <text:p text:style-name="P7"><text:soft-page-break/><text:span text:style-name="T2">Update your map </text:span><text:span text:style-name="T2"><draw:frame draw:style-name="fr1" draw:name="UUID60" text:anchor-type="as-char" svg:width="0.411cm" svg:height="0.411cm" draw:z-index="68"><draw:image xlink:href="Pictures/1000000100000064000000647F111E6C6588B849.png" xlink:type="simple" xlink:show="embed" xlink:actuate="onLoad" draw:mime-type="image/png"/></draw:frame></text:span><text:span text:style-name="T2"><text:s/>and finally activate </text:span><text:span text:style-name="T3">all of the star-shaped tab cards</text:span><text:span text:style-name="T2"> </text:span><text:span text:style-name="T2"><draw:frame draw:style-name="fr1" draw:name="UUID61" text:anchor-type="as-char" svg:width="0.674cm" svg:height="0.411cm" draw:z-index="69"><draw:image xlink:href="Pictures/10000001000000A400000064105341F3A17CE00B.png" xlink:type="simple" xlink:show="embed" xlink:actuate="onLoad" draw:mime-type="image/png"/></draw:frame></text:span><text:span text:style-name="T2"><text:s/>in the Sight Area one by one in any order.</text:span></text:p>
        <text:p text:style-name="Standard"/>
        <table:table table:name="Tabella8" table:style-name="Tabella8">
          <table:table-column table:style-name="Tabella8.A"/>
          <table:table-row table:style-name="Tabella8.1">
            <table:table-cell table:style-name="Tabella8.A1" office:value-type="string">
              <text:p text:style-name="P1">Getting lost was the Ancient Stampadians' greatest fear, as evidenced by missing information about orientation in Move effects, but this made them real experts at creating maps. The entrance cell name, for example, is always an "A" - a letter that resembles an arrow pointing North.</text:p>
            </table:table-cell>
          </table:table-row>
        </table:table>
        <text:p text:style-name="Standard"/>
        <text:p text:style-name="P4">Change Effects</text:p>
        <text:p text:style-name="Standard"/>
        <text:p text:style-name="P1">Ancient Stampadians have memories of <text:span text:style-name="T1">the dungeon changing</text:span>, buried in <text:span text:style-name="T1">the Forgotten Deck</text:span>. <text:span text:style-name="T1">Change effects</text:span> may bring them back, allowing you to explore even deeper.</text:p>
        <text:p text:style-name="Standard"/>
        <text:p text:style-name="P1"><draw:frame draw:style-name="fr2" draw:name="UUID62" text:anchor-type="char" svg:width="8.25cm" svg:height="4.288cm" draw:z-index="70"><draw:image xlink:href="Pictures/10000001000007D000000410F9CC320FCA213790.png" xlink:type="simple" xlink:show="embed" xlink:actuate="onLoad" draw:mime-type="image/png"/></draw:frame></text:p>
        <text:p text:style-name="P1">Change effects <draw:frame draw:style-name="fr1" draw:name="UUID63" text:anchor-type="as-char" svg:width="1.96cm" svg:height="0.473cm" draw:z-index="72"><draw:image xlink:href="Pictures/10000001000001DD000000730E14E12F31FD2511.png" xlink:type="simple" xlink:show="embed" xlink:actuate="onLoad" draw:mime-type="image/png"/></draw:frame><text:s/>are described by a first card and a set <draw:frame draw:style-name="fr1" draw:name="UUID64" text:anchor-type="as-char" svg:width="0.411cm" svg:height="0.473cm" draw:z-index="73"><draw:image xlink:href="Pictures/100000010000006400000073081E32AAC9D1C699.png" xlink:type="simple" xlink:show="embed" xlink:actuate="onLoad" draw:mime-type="image/png"/></draw:frame><draw:frame draw:style-name="fr1" draw:name="UUID65" text:anchor-type="as-char" svg:width="0.411cm" svg:height="0.411cm" draw:z-index="74"><draw:image xlink:href="Pictures/1000000100000064000000649F6C487DED0FB695.png" xlink:type="simple" xlink:show="embed" xlink:actuate="onLoad" draw:mime-type="image/png"/></draw:frame>, an arrow pointing to the right <draw:frame draw:style-name="fr1" draw:name="UUID66" text:anchor-type="as-char" svg:width="0.473cm" svg:height="0.411cm" draw:z-index="76"><draw:image xlink:href="Pictures/1000000100000073000000641F86D86CDAC4DDBE.png" xlink:type="simple" xlink:show="embed" xlink:actuate="onLoad" draw:mime-type="image/png"/></draw:frame>, and a second card with another set <draw:frame draw:style-name="fr1" draw:name="UUID67" text:anchor-type="as-char" svg:width="0.411cm" svg:height="0.473cm" draw:z-index="77"><draw:image xlink:href="Pictures/100000010000006400000073081E32AAC9D1C699.png" xlink:type="simple" xlink:show="embed" xlink:actuate="onLoad" draw:mime-type="image/png"/></draw:frame><draw:frame draw:style-name="fr1" draw:name="UUID68" text:anchor-type="as-char" svg:width="0.411cm" svg:height="0.411cm" draw:z-index="78"><draw:image xlink:href="Pictures/100000010000006400000064E1B07EAA778F88B2.png" xlink:type="simple" xlink:show="embed" xlink:actuate="onLoad" draw:mime-type="image/png"/></draw:frame>. To perform a Change effect, look for the first card <text:span text:style-name="T1">in any area</text:span> and, if you find it, swap it with the second card <text:span text:style-name="T1">in the Forgotten Deck</text:span>. To be valid, the card must be straight, <text:span text:style-name="T1">with the card number in the top left and the card set in the top right</text:span>. The effect <text:span text:style-name="T1">is one-way only</text:span>, so if you can't find the first card because it has already been swapped, ignore the Change effect.</text:p>
        <text:p text:style-name="Standard"/>
        <table:table table:name="Tabella9" table:style-name="Tabella9">
          <table:table-column table:style-name="Tabella9.A"/>
          <table:table-row table:style-name="Tabella9.1">
            <table:table-cell table:style-name="Tabella9.A1" office:value-type="string">
              <text:p text:style-name="P1">The <draw:frame draw:style-name="fr1" draw:name="UUID69" text:anchor-type="as-char" svg:width="0.411cm" svg:height="0.411cm" draw:z-index="79"><draw:image xlink:href="Pictures/1000000100000064000000646623D71B234B7EEA.png" xlink:type="simple" xlink:show="embed" xlink:actuate="onLoad" draw:mime-type="image/png"/></draw:frame><text:s/>Rotate action triggers a special Change effect that <text:span text:style-name="T1">flips the card upside-down</text:span>, showing a different set. The card can only be flipped back <text:span text:style-name="T1">if the </text:span><text:span text:style-name="T1"><draw:frame draw:style-name="fr1" draw:name="UUID70" text:anchor-type="as-char" svg:width="0.411cm" svg:height="0.411cm" draw:z-index="80"><draw:image xlink:href="Pictures/1000000100000064000000646623D71B234B7EEA.png" xlink:type="simple" xlink:show="embed" xlink:actuate="onLoad" draw:mime-type="image/png"/></draw:frame></text:span><text:span text:style-name="T1"><text:s/>Rotate action is present in the upper half of the new card</text:span>, as for any other card.</text:p>
            </table:table-cell>
          </table:table-row>
        </table:table>
        <text:p text:style-name="Standard"/>
        <text:p text:style-name="P4"/>
        <text:p text:style-name="P4"/>
        <text:p text:style-name="P4"/>
        <text:p text:style-name="P4">The Emergency Teleport</text:p>
        <text:p text:style-name="Standard"/>
        <text:p text:style-name="P1">We've added an emergency <draw:frame draw:style-name="fr1" draw:name="UUID71" text:anchor-type="as-char" svg:width="0.411cm" svg:height="0.411cm" draw:z-index="83"><draw:image xlink:href="Pictures/1000000100000064000000645091F1AABB5BE5AC.png" xlink:type="simple" xlink:show="embed" xlink:actuate="onLoad" draw:mime-type="image/png"/></draw:frame><text:s/>Teleport action to the memory exploration system: you can find it in the bottom left of your Character Sheet.</text:p>
        <text:p text:style-name="Standard"/>
        <text:p text:style-name="P1"><draw:frame draw:style-name="fr2" draw:name="UUID72" text:anchor-type="char" svg:width="8.25cm" svg:height="4.288cm" draw:z-index="81"><draw:image xlink:href="Pictures/10000001000007D0000004107C4B523A6295C19A.png" xlink:type="simple" xlink:show="embed" xlink:actuate="onLoad" draw:mime-type="image/png"/></draw:frame></text:p>
        <text:p text:style-name="P1">Instead of performing an action, you can teleport back to the A cell, facing North.</text:p>
        <text:p text:style-name="Standard"/>
        <table:table table:name="Tabella10" table:style-name="Tabella10">
          <table:table-column table:style-name="Tabella10.A"/>
          <table:table-row table:style-name="Tabella10.1">
            <table:table-cell table:style-name="Tabella10.A1" office:value-type="string">
              <text:p text:style-name="P1">The Ancient Stampadians didn't have this help, finding themselves having to retrace their steps over and over again... <text:span text:style-name="T1">with all that entailed</text:span>. If you want a more authentic experience, just ignore this system.</text:p>
            </table:table-cell>
          </table:table-row>
        </table:table>
        <text:p text:style-name="Standard"/>
        <text:p text:style-name="P4">Resources</text:p>
        <text:p text:style-name="Standard"/>
        <table:table table:name="Tabella11" table:style-name="Tabella11">
          <table:table-column table:style-name="Tabella11.A"/>
          <table:table-row table:style-name="Tabella11.1">
            <table:table-cell table:style-name="Tabella11.A1" office:value-type="string">
              <text:p text:style-name="P1">The Ancient Stampadian culture is rich in extremely peculiar myths and traditions, where everything, from fruit to jewelry, is part of a complex ritual and could be worth as much as life itself.</text:p>
            </table:table-cell>
          </table:table-row>
        </table:table>
        <text:p text:style-name="Standard"/>
        <text:p text:style-name="P1">In the world of the Ancient Stampadians, everything was a resource: from your health and strength to keys, jewelry, and fish. Your resources are tracked by your Character Sheet. As you start the game, you already have 6 Health resources <draw:frame draw:style-name="fr1" draw:name="UUID73" text:anchor-type="as-char" svg:width="0.411cm" svg:height="0.411cm" draw:z-index="85"><draw:image xlink:href="Pictures/10000001000000640000006445BD65E4E0981768.png" xlink:type="simple" xlink:show="embed" xlink:actuate="onLoad" draw:mime-type="image/png"/></draw:frame>, 1 Gold resource <draw:frame draw:style-name="fr1" draw:name="UUID74" text:anchor-type="as-char" svg:width="0.411cm" svg:height="0.411cm" draw:z-index="86"><draw:image xlink:href="Pictures/1000000100000064000000647BE45AD0E8618197.png" xlink:type="simple" xlink:show="embed" xlink:actuate="onLoad" draw:mime-type="image/png"/></draw:frame>, and 1 Strength resource <draw:frame draw:style-name="fr1" draw:name="UUID75" text:anchor-type="as-char" svg:width="0.411cm" svg:height="0.411cm" draw:z-index="87"><draw:image xlink:href="Pictures/1000000100000064000000648813B6AC09DB83E9.png" xlink:type="simple" xlink:show="embed" xlink:actuate="onLoad" draw:mime-type="image/png"/></draw:frame>. Via effects and conditions, you can add, lose, or manipulate resources at specific inventory boxes.</text:p>
        <text:p text:style-name="Standard"/>
        <table:table table:name="Tabella12" table:style-name="Tabella12">
          <table:table-column table:style-name="Tabella12.A"/>
          <table:table-row table:style-name="Tabella12.1">
            <table:table-cell table:style-name="Tabella12.A1" office:value-type="string">
              <text:p text:style-name="P1">This chapter explains the resource management rules. They're simple to apply but difficult to explain. Feel free to skip it and to come back to it later: some players prefer to learn the rules by playing and from the Character Sheet, coming back to the rulebook later for clarifications, while others prefer to read the full explanation first.</text:p>
            </table:table-cell>
          </table:table-row>
        </table:table>
        <text:p text:style-name="Standard"><text:soft-page-break/></text:p>
        <text:p text:style-name="P1"><draw:frame draw:style-name="fr2" draw:name="UUID76" text:anchor-type="char" svg:width="8.25cm" svg:height="4.288cm" draw:z-index="82"><draw:image xlink:href="Pictures/10000001000007D0000004109C5450E173A5E502.png" xlink:type="simple" xlink:show="embed" xlink:actuate="onLoad" draw:mime-type="image/png"/></draw:frame></text:p>
        <text:p text:style-name="P1">The <text:span text:style-name="T1">+X </text:span><text:span text:style-name="T1"><draw:frame draw:style-name="fr1" draw:name="UUID77" text:anchor-type="as-char" svg:width="0.411cm" svg:height="0.411cm" draw:z-index="89"><draw:image xlink:href="Pictures/100000010000006400000064EE915BB3A728221B.png" xlink:type="simple" xlink:show="embed" xlink:actuate="onLoad" draw:mime-type="image/png"/></draw:frame></text:span><text:span text:style-name="T1"><text:s/>effect</text:span> adds X resources of the <draw:frame draw:style-name="fr1" draw:name="UUID78" text:anchor-type="as-char" svg:width="0.411cm" svg:height="0.411cm" draw:z-index="90"><draw:image xlink:href="Pictures/100000010000006400000064EE915BB3A728221B.png" xlink:type="simple" xlink:show="embed" xlink:actuate="onLoad" draw:mime-type="image/png"/></draw:frame><text:s/>type to your inventory. The first time you add a resource, draw the resource symbol on the first box and tick as many numbered boxes as the resources you added <text:span text:style-name="T1">from left to right</text:span> <draw:frame draw:style-name="fr1" draw:name="UUID79" text:anchor-type="as-char" svg:width="0.411cm" svg:height="0.411cm" draw:z-index="91"><draw:image xlink:href="Pictures/10000001000000640000006436DE474D9C193B3D.png" xlink:type="simple" xlink:show="embed" xlink:actuate="onLoad" draw:mime-type="image/png"/></draw:frame>. You can have <text:span text:style-name="T1">no more than 6 resources of each type</text:span> (except for Gold, which has no limit). As you add more resources of the same type, keep ticking boxes <text:span text:style-name="T1">starting from the leftmost empty box</text:span> <draw:frame draw:style-name="fr1" draw:name="UUID80" text:anchor-type="as-char" svg:width="0.411cm" svg:height="0.411cm" draw:z-index="92"><draw:image xlink:href="Pictures/100000010000006400000064593EF5D0ABAB03F5.png" xlink:type="simple" xlink:show="embed" xlink:actuate="onLoad" draw:mime-type="image/png"/></draw:frame>. All resources beyond the 6th are lost. Although the sheet only shows a few pre-printed spaces, <text:span text:style-name="T1">you can bring unlimited resource types with you</text:span>.</text:p>
        <text:p text:style-name="P1">The <text:span text:style-name="T1">+X° </text:span><text:span text:style-name="T1"><draw:frame draw:style-name="fr1" draw:name="UUID81" text:anchor-type="as-char" svg:width="0.411cm" svg:height="0.411cm" draw:z-index="93"><draw:image xlink:href="Pictures/100000010000006400000064EE915BB3A728221B.png" xlink:type="simple" xlink:show="embed" xlink:actuate="onLoad" draw:mime-type="image/png"/></draw:frame></text:span><text:span text:style-name="T1"><text:s/>effect</text:span> will give you <text:span text:style-name="T1">a single resource</text:span> at the Xth box <draw:frame draw:style-name="fr1" draw:name="UUID82" text:anchor-type="as-char" svg:width="0.411cm" svg:height="0.411cm" draw:z-index="94"><draw:image xlink:href="Pictures/10000001000000640000006448F9F31E2308037E.png" xlink:type="simple" xlink:show="embed" xlink:actuate="onLoad" draw:mime-type="image/png"/></draw:frame>. Adding a resource to an already ticked box has no effect. As you add more resources with the <text:span text:style-name="T1">+X </text:span><text:span text:style-name="T1"><draw:frame draw:style-name="fr1" draw:name="UUID83" text:anchor-type="as-char" svg:width="0.411cm" svg:height="0.411cm" draw:z-index="95"><draw:image xlink:href="Pictures/100000010000006400000064EE915BB3A728221B.png" xlink:type="simple" xlink:show="embed" xlink:actuate="onLoad" draw:mime-type="image/png"/></draw:frame></text:span><text:span text:style-name="T1"><text:s/>effect</text:span>, always <text:span text:style-name="T1">start ticking the leftmost empty boxes first</text:span> <draw:frame draw:style-name="fr1" draw:name="UUID84" text:anchor-type="as-char" svg:width="0.411cm" svg:height="0.411cm" draw:z-index="96"><draw:image xlink:href="Pictures/1000000100000064000000647F111E6C6588B849.png" xlink:type="simple" xlink:show="embed" xlink:actuate="onLoad" draw:mime-type="image/png"/></draw:frame>.</text:p>
        <text:p text:style-name="P1">The <text:span text:style-name="T1">-X </text:span><text:span text:style-name="T1"><draw:frame draw:style-name="fr1" draw:name="UUID85" text:anchor-type="as-char" svg:width="0.411cm" svg:height="0.411cm" draw:z-index="97"><draw:image xlink:href="Pictures/100000010000006400000064EE915BB3A728221B.png" xlink:type="simple" xlink:show="embed" xlink:actuate="onLoad" draw:mime-type="image/png"/></draw:frame></text:span><text:span text:style-name="T1"><text:s/>effect</text:span> will remove X resources of <draw:frame draw:style-name="fr1" draw:name="UUID86" text:anchor-type="as-char" svg:width="0.411cm" svg:height="0.411cm" draw:z-index="98"><draw:image xlink:href="Pictures/100000010000006400000064EE915BB3A728221B.png" xlink:type="simple" xlink:show="embed" xlink:actuate="onLoad" draw:mime-type="image/png"/></draw:frame><text:s/>type from your inventory. Resources are removed, <text:span text:style-name="T1">clearing the rightmost ticked boxes first</text:span> <draw:frame draw:style-name="fr1" draw:name="UUID87" text:anchor-type="as-char" svg:width="0.411cm" svg:height="0.411cm" draw:z-index="99"><draw:image xlink:href="Pictures/100000010000006400000064B811DB04FA0728B6.png" xlink:type="simple" xlink:show="embed" xlink:actuate="onLoad" draw:mime-type="image/png"/></draw:frame>. If an effect tells you to lose more resources than you have, lose them all instead.</text:p>
        <text:p text:style-name="Standard"/>
        <text:p text:style-name="P1"><draw:frame draw:style-name="fr2" draw:name="UUID88" text:anchor-type="char" svg:width="8.25cm" svg:height="4.288cm" draw:z-index="154"><draw:image xlink:href="Pictures/10000001000007D0000004105B77D42805B52FCC.png" xlink:type="simple" xlink:show="embed" xlink:actuate="onLoad" draw:mime-type="image/png"/></draw:frame></text:p>
        <text:p text:style-name="P1">The <text:span text:style-name="T1">-X° </text:span><text:span text:style-name="T1"><draw:frame draw:style-name="fr1" draw:name="UUID89" text:anchor-type="as-char" svg:width="0.411cm" svg:height="0.411cm" draw:z-index="100"><draw:image xlink:href="Pictures/100000010000006400000064EE915BB3A728221B.png" xlink:type="simple" xlink:show="embed" xlink:actuate="onLoad" draw:mime-type="image/png"/></draw:frame></text:span><text:span text:style-name="T1"><text:s/>effect</text:span> will remove <text:span text:style-name="T1">a single resource</text:span> at the Xth box <draw:frame draw:style-name="fr1" draw:name="UUID90" text:anchor-type="as-char" svg:width="0.411cm" svg:height="0.411cm" draw:z-index="101"><draw:image xlink:href="Pictures/10000001000000640000006436DE474D9C193B3D.png" xlink:type="simple" xlink:show="embed" xlink:actuate="onLoad" draw:mime-type="image/png"/></draw:frame>. Removing a resource on an empty box has no effect.</text:p>
        <text:p text:style-name="P1">The <text:span text:style-name="T1"><draw:frame draw:style-name="fr1" draw:name="UUID91" text:anchor-type="as-char" svg:width="0.33cm" svg:height="0.33cm" draw:z-index="102"><draw:image xlink:href="Pictures/100000010000005000000050BCD77890C0634037.png" xlink:type="simple" xlink:show="embed" xlink:actuate="onLoad" draw:mime-type="image/png"/></draw:frame></text:span><text:span text:style-name="T1">X </text:span><text:span text:style-name="T1"><draw:frame draw:style-name="fr1" draw:name="UUID92" text:anchor-type="as-char" svg:width="0.411cm" svg:height="0.411cm" draw:z-index="103"><draw:image xlink:href="Pictures/100000010000006400000064EE915BB3A728221B.png" xlink:type="simple" xlink:show="embed" xlink:actuate="onLoad" draw:mime-type="image/png"/></draw:frame></text:span><text:span text:style-name="T1"><text:s/>effect</text:span> will <text:span text:style-name="T1">set the amount of resource you have</text:span> <draw:frame draw:style-name="fr1" draw:name="UUID93" text:anchor-type="as-char" svg:width="0.411cm" svg:height="0.411cm" draw:z-index="104"><draw:image xlink:href="Pictures/100000010000006400000064593EF5D0ABAB03F5.png" xlink:type="simple" xlink:show="embed" xlink:actuate="onLoad" draw:mime-type="image/png"/></draw:frame>, adding or removing them <text:span text:style-name="T1">following the +X </text:span><text:span text:style-name="T1"><draw:frame draw:style-name="fr1" draw:name="UUID94" text:anchor-type="as-char" svg:width="0.411cm" svg:height="0.411cm" draw:z-index="105"><draw:image xlink:href="Pictures/100000010000006400000064EE915BB3A728221B.png" xlink:type="simple" xlink:show="embed" xlink:actuate="onLoad" draw:mime-type="image/png"/></draw:frame></text:span><text:span text:style-name="T1"><text:s/>and -X </text:span><text:span text:style-name="T1"><draw:frame draw:style-name="fr1" draw:name="UUID95" text:anchor-type="as-char" svg:width="0.411cm" svg:height="0.411cm" draw:z-index="106"><draw:image xlink:href="Pictures/100000010000006400000064EE915BB3A728221B.png" xlink:type="simple" xlink:show="embed" xlink:actuate="onLoad" draw:mime-type="image/png"/></draw:frame></text:span><text:span text:style-name="T1"><text:s/>rules</text:span> (add by ticking the leftmost empty boxes, lose by clearing the rightmost ticked boxes).</text:p>
        <text:p text:style-name="P1">Resources often appear <text:span text:style-name="T1">in conditions</text:span> too <draw:frame draw:style-name="fr1" draw:name="UUID96" text:anchor-type="as-char" svg:width="0.411cm" svg:height="0.411cm" draw:z-index="107"><draw:image xlink:href="Pictures/10000001000000640000006448F9F31E2308037E.png" xlink:type="simple" xlink:show="embed" xlink:actuate="onLoad" draw:mime-type="image/png"/></draw:frame>, to check if you have <text:span text:style-name="T1">a resource on a specific box</text:span>, <text:span text:style-name="T1">more or less than</text:span>, <text:span text:style-name="T1">at least one</text:span>, or <text:span text:style-name="T1">the exact amount</text:span> of a specific resource.</text:p>
        <text:p text:style-name="Standard"/>
        <text:p text:style-name="P1"><draw:frame draw:style-name="fr2" draw:name="UUID97" text:anchor-type="char" svg:width="8.25cm" svg:height="4.288cm" draw:z-index="156"><draw:image xlink:href="Pictures/10000001000007D000000410A5696200D474136F.png" xlink:type="simple" xlink:show="embed" xlink:actuate="onLoad" draw:mime-type="image/png"/></draw:frame></text:p>
        <text:p text:style-name="P1"><text:span text:style-name="T1">Resource effects may also appear as conditions</text:span>, both <text:span text:style-name="T1">testing a condition</text:span> and <text:span text:style-name="T1">changing your inventory</text:span> if that change <text:span text:style-name="T1">can be performed entirely</text:span>. For example, the <text:span text:style-name="T1">-3 </text:span><text:span text:style-name="T1"><draw:frame draw:style-name="fr1" draw:name="UUID98" text:anchor-type="as-char" svg:width="0.411cm" svg:height="0.411cm" draw:z-index="108"><draw:image xlink:href="Pictures/100000010000006400000064EE915BB3A728221B.png" xlink:type="simple" xlink:show="embed" xlink:actuate="onLoad" draw:mime-type="image/png"/></draw:frame></text:span><text:span text:style-name="T1"><text:s/>effect</text:span> will remove 3 <draw:frame draw:style-name="fr1" draw:name="UUID99" text:anchor-type="as-char" svg:width="0.411cm" svg:height="0.411cm" draw:z-index="109"><draw:image xlink:href="Pictures/100000010000006400000064EE915BB3A728221B.png" xlink:type="simple" xlink:show="embed" xlink:actuate="onLoad" draw:mime-type="image/png"/></draw:frame><text:s/>from your inventory. As an exception, it will remove all of your <draw:frame draw:style-name="fr1" draw:name="UUID100" text:anchor-type="as-char" svg:width="0.411cm" svg:height="0.411cm" draw:z-index="110"><draw:image xlink:href="Pictures/100000010000006400000064EE915BB3A728221B.png" xlink:type="simple" xlink:show="embed" xlink:actuate="onLoad" draw:mime-type="image/png"/></draw:frame><text:s/>if you have less than 3 of them.</text:p>
        <text:p text:style-name="P1">The <text:span text:style-name="T1">-3 </text:span><text:span text:style-name="T1"><draw:frame draw:style-name="fr1" draw:name="UUID101" text:anchor-type="as-char" svg:width="0.411cm" svg:height="0.411cm" draw:z-index="111"><draw:image xlink:href="Pictures/100000010000006400000064EE915BB3A728221B.png" xlink:type="simple" xlink:show="embed" xlink:actuate="onLoad" draw:mime-type="image/png"/></draw:frame></text:span><text:span text:style-name="T1">:... condition</text:span>, like <text:span text:style-name="T1">-3 </text:span><text:span text:style-name="T1"><draw:frame draw:style-name="fr1" draw:name="UUID102" text:anchor-type="as-char" svg:width="0.411cm" svg:height="0.411cm" draw:z-index="112"><draw:image xlink:href="Pictures/100000010000006400000064EE915BB3A728221B.png" xlink:type="simple" xlink:show="embed" xlink:actuate="onLoad" draw:mime-type="image/png"/></draw:frame></text:span><text:span text:style-name="T1">:+1 </text:span><text:span text:style-name="T1"><draw:frame draw:style-name="fr1" draw:name="UUID103" text:anchor-type="as-char" svg:width="0.411cm" svg:height="0.411cm" draw:z-index="113"><draw:image xlink:href="Pictures/10000001000000640000006445BD65E4E0981768.png" xlink:type="simple" xlink:show="embed" xlink:actuate="onLoad" draw:mime-type="image/png"/></draw:frame></text:span>, will trigger if 3 <draw:frame draw:style-name="fr1" draw:name="UUID104" text:anchor-type="as-char" svg:width="0.411cm" svg:height="0.411cm" draw:z-index="114"><draw:image xlink:href="Pictures/100000010000006400000064EE915BB3A728221B.png" xlink:type="simple" xlink:show="embed" xlink:actuate="onLoad" draw:mime-type="image/png"/></draw:frame><text:s/>resources can be removed from your inventory <text:span text:style-name="T1">entirely</text:span>. So it won't be verified if you have 2 <draw:frame draw:style-name="fr1" draw:name="UUID105" text:anchor-type="as-char" svg:width="0.411cm" svg:height="0.411cm" draw:z-index="115"><draw:image xlink:href="Pictures/100000010000006400000064EE915BB3A728221B.png" xlink:type="simple" xlink:show="embed" xlink:actuate="onLoad" draw:mime-type="image/png"/></draw:frame><text:s/>or fewer and nothing will happen to your inventory <draw:frame draw:style-name="fr1" draw:name="UUID106" text:anchor-type="as-char" svg:width="0.411cm" svg:height="0.411cm" draw:z-index="116"><draw:image xlink:href="Pictures/10000001000000640000006436DE474D9C193B3D.png" xlink:type="simple" xlink:show="embed" xlink:actuate="onLoad" draw:mime-type="image/png"/></draw:frame>. If you have 3 <draw:frame draw:style-name="fr1" draw:name="UUID107" text:anchor-type="as-char" svg:width="0.411cm" svg:height="0.411cm" draw:z-index="117"><draw:image xlink:href="Pictures/100000010000006400000064EE915BB3A728221B.png" xlink:type="simple" xlink:show="embed" xlink:actuate="onLoad" draw:mime-type="image/png"/></draw:frame><text:s/>resources or more, the condition will remove 3 of them to be verified, and it will trigger its effect - in the example, it will give you 1 <draw:frame draw:style-name="fr1" draw:name="UUID108" text:anchor-type="as-char" svg:width="0.411cm" svg:height="0.411cm" draw:z-index="118"><draw:image xlink:href="Pictures/10000001000000640000006445BD65E4E0981768.png" xlink:type="simple" xlink:show="embed" xlink:actuate="onLoad" draw:mime-type="image/png"/></draw:frame>. <draw:frame draw:style-name="fr1" draw:name="UUID109" text:anchor-type="as-char" svg:width="0.411cm" svg:height="0.411cm" draw:z-index="119"><draw:image xlink:href="Pictures/100000010000006400000064593EF5D0ABAB03F5.png" xlink:type="simple" xlink:show="embed" xlink:actuate="onLoad" draw:mime-type="image/png"/></draw:frame></text:p>
        <text:p text:style-name="P1"><text:span text:style-name="T1">Any resource effect may appear as a condition</text:span>, so a <text:span text:style-name="T1">+3°</text:span><text:span text:style-name="T1"><draw:frame draw:style-name="fr1" draw:name="UUID110" text:anchor-type="as-char" svg:width="0.411cm" svg:height="0.411cm" draw:z-index="120"><draw:image xlink:href="Pictures/100000010000006400000064EE915BB3A728221B.png" xlink:type="simple" xlink:show="embed" xlink:actuate="onLoad" draw:mime-type="image/png"/></draw:frame></text:span><text:span text:style-name="T1"> condition</text:span> will trigger if your 3rd <draw:frame draw:style-name="fr1" draw:name="UUID111" text:anchor-type="as-char" svg:width="0.411cm" svg:height="0.411cm" draw:z-index="121"><draw:image xlink:href="Pictures/100000010000006400000064EE915BB3A728221B.png" xlink:type="simple" xlink:show="embed" xlink:actuate="onLoad" draw:mime-type="image/png"/></draw:frame><text:s/>can be ticked, a <text:span text:style-name="T1">+3 </text:span><text:span text:style-name="T1"><draw:frame draw:style-name="fr1" draw:name="UUID112" text:anchor-type="as-char" svg:width="0.411cm" svg:height="0.411cm" draw:z-index="122"><draw:image xlink:href="Pictures/100000010000006400000064EE915BB3A728221B.png" xlink:type="simple" xlink:show="embed" xlink:actuate="onLoad" draw:mime-type="image/png"/></draw:frame></text:span><text:span text:style-name="T1"><text:s/>condition</text:span> will trigger if you can add 3 <draw:frame draw:style-name="fr1" draw:name="UUID113" text:anchor-type="as-char" svg:width="0.411cm" svg:height="0.411cm" draw:z-index="123"><draw:image xlink:href="Pictures/100000010000006400000064EE915BB3A728221B.png" xlink:type="simple" xlink:show="embed" xlink:actuate="onLoad" draw:mime-type="image/png"/></draw:frame><text:s/>resources without losing any of them, and so on.</text:p>
        <text:p text:style-name="Standard"/>
        <text:p text:style-name="P4">Offerings, Power, and Order</text:p>
        <text:p text:style-name="Standard"/>
        <text:p text:style-name="P1">The <text:span text:style-name="T1"><draw:frame draw:style-name="fr1" draw:name="UUID114" text:anchor-type="as-char" svg:width="0.411cm" svg:height="0.411cm" draw:z-index="124"><draw:image xlink:href="Pictures/100000010000006400000064125958B34D2B4211.png" xlink:type="simple" xlink:show="embed" xlink:actuate="onLoad" draw:mime-type="image/png"/></draw:frame></text:span><text:span text:style-name="T1"><text:s/>Offer effect and condition</text:span> allow you to decide to remove any amount of a requested resource between A and B. The amount spent usually affects <text:span text:style-name="T1">an </text:span><text:span text:style-name="T1"><draw:frame draw:style-name="fr1" draw:name="UUID115" text:anchor-type="as-char" svg:width="0.411cm" svg:height="0.411cm" draw:z-index="125"><draw:image xlink:href="Pictures/100000010000006400000064A9822BC4B3963346.png" xlink:type="simple" xlink:show="embed" xlink:actuate="onLoad" draw:mime-type="image/png"/></draw:frame></text:span><text:span text:style-name="T1"><text:s/>Action Power</text:span>, which is calculated following a sequence of operations <text:span text:style-name="T1">in a specific order</text:span>.</text:p>
        <text:p text:style-name="Standard"/>
        <text:p text:style-name="P1"><draw:frame draw:style-name="fr2" draw:name="UUID116" text:anchor-type="char" svg:width="8.25cm" svg:height="4.288cm" draw:z-index="152"><draw:image xlink:href="Pictures/10000001000007D000000410E20E48C8CE00E828.png" xlink:type="simple" xlink:show="embed" xlink:actuate="onLoad" draw:mime-type="image/png"/></draw:frame><text:soft-page-break/></text:p>
        <text:p text:style-name="P1">In these examples, both <draw:frame draw:style-name="fr1" draw:name="UUID117" text:anchor-type="as-char" svg:width="0.411cm" svg:height="0.411cm" draw:z-index="126"><draw:image xlink:href="Pictures/10000001000000640000006436DE474D9C193B3D.png" xlink:type="simple" xlink:show="embed" xlink:actuate="onLoad" draw:mime-type="image/png"/></draw:frame><text:s/>and <draw:frame draw:style-name="fr1" draw:name="UUID118" text:anchor-type="as-char" svg:width="0.411cm" svg:height="0.411cm" draw:z-index="127"><draw:image xlink:href="Pictures/100000010000006400000064593EF5D0ABAB03F5.png" xlink:type="simple" xlink:show="embed" xlink:actuate="onLoad" draw:mime-type="image/png"/></draw:frame><text:s/>are asking to calculate the <draw:frame draw:style-name="fr1" draw:name="UUID119" text:anchor-type="as-char" svg:width="0.411cm" svg:height="0.411cm" draw:z-index="128"><draw:image xlink:href="Pictures/100000010000006400000064A9822BC4B3963346.png" xlink:type="simple" xlink:show="embed" xlink:actuate="onLoad" draw:mime-type="image/png"/></draw:frame><text:s/>Action Power by rolling a die and offering some resources, but <text:span text:style-name="T1">the different steps order greatly impact how to do that</text:span>.</text:p>
        <text:p text:style-name="P1">In <draw:frame draw:style-name="fr1" draw:name="UUID120" text:anchor-type="as-char" svg:width="0.411cm" svg:height="0.411cm" draw:z-index="129"><draw:image xlink:href="Pictures/10000001000000640000006436DE474D9C193B3D.png" xlink:type="simple" xlink:show="embed" xlink:actuate="onLoad" draw:mime-type="image/png"/></draw:frame>, you have to place your offering <text:span text:style-name="T1">before seeing the die result</text:span>, and in <draw:frame draw:style-name="fr1" draw:name="UUID121" text:anchor-type="as-char" svg:width="0.411cm" svg:height="0.411cm" draw:z-index="130"><draw:image xlink:href="Pictures/100000010000006400000064593EF5D0ABAB03F5.png" xlink:type="simple" xlink:show="embed" xlink:actuate="onLoad" draw:mime-type="image/png"/></draw:frame><text:s/>you have to place your offering <text:span text:style-name="T1">after seeing the die result</text:span>. As the <draw:frame draw:style-name="fr1" draw:name="UUID122" text:anchor-type="as-char" svg:width="0.411cm" svg:height="0.411cm" draw:z-index="131"><draw:image xlink:href="Pictures/100000010000006400000064A9822BC4B3963346.png" xlink:type="simple" xlink:show="embed" xlink:actuate="onLoad" draw:mime-type="image/png"/></draw:frame><text:s/>Action Power is usually used by following conditions, and usually the higher the better, offering first <draw:frame draw:style-name="fr1" draw:name="UUID123" text:anchor-type="as-char" svg:width="0.411cm" svg:height="0.411cm" draw:z-index="148"><draw:image xlink:href="Pictures/10000001000000640000006436DE474D9C193B3D.png" xlink:type="simple" xlink:show="embed" xlink:actuate="onLoad" draw:mime-type="image/png"/></draw:frame><text:s/>is more risky than offering later <draw:frame draw:style-name="fr1" draw:name="UUID124" text:anchor-type="as-char" svg:width="0.411cm" svg:height="0.411cm" draw:z-index="149"><draw:image xlink:href="Pictures/100000010000006400000064593EF5D0ABAB03F5.png" xlink:type="simple" xlink:show="embed" xlink:actuate="onLoad" draw:mime-type="image/png"/></draw:frame>.</text:p>
        <text:p text:style-name="Standard"/>
        <table:table table:name="Tabella13" table:style-name="Tabella13">
          <table:table-column table:style-name="Tabella13.A"/>
          <table:table-row table:style-name="Tabella13.1">
            <table:table-cell table:style-name="Tabella13.A1" office:value-type="string">
              <text:p text:style-name="P1">Strictly following the order of operations applies both to calculating the Action Power and to the many other Stampadian rituals recounted in the memories...</text:p>
            </table:table-cell>
          </table:table-row>
        </table:table>
        <text:p text:style-name="Standard"/>
        <text:p text:style-name="P4">Golden Rules</text:p>
        <text:p text:style-name="Standard"/>
        <text:p text:style-name="P1"><text:span text:style-name="T1">Cards have no memory</text:span> so, every time you activate a new card, consider no dice rolled or in game, zero resources <draw:frame draw:style-name="fr1" draw:name="UUID125" text:anchor-type="as-char" svg:width="0.411cm" svg:height="0.411cm" draw:z-index="132"><draw:image xlink:href="Pictures/100000010000006400000064125958B34D2B4211.png" xlink:type="simple" xlink:show="embed" xlink:actuate="onLoad" draw:mime-type="image/png"/></draw:frame><text:s/>Offered, and zero <draw:frame draw:style-name="fr1" draw:name="UUID126" text:anchor-type="as-char" svg:width="0.411cm" svg:height="0.411cm" draw:z-index="133"><draw:image xlink:href="Pictures/100000010000006400000064A9822BC4B3963346.png" xlink:type="simple" xlink:show="embed" xlink:actuate="onLoad" draw:mime-type="image/png"/></draw:frame><text:s/>Action Power.</text:p>
        <text:p text:style-name="Standard"/>
        <text:p text:style-name="P4">Winning and Losing</text:p>
        <text:p text:style-name="Standard"/>
        <text:p text:style-name="P1"><draw:frame draw:style-name="fr2" draw:name="UUID127" text:anchor-type="char" svg:width="8.25cm" svg:height="4.288cm" draw:z-index="155"><draw:image xlink:href="Pictures/10000001000007D00000041069419D0530A5A85C.png" xlink:type="simple" xlink:show="embed" xlink:actuate="onLoad" draw:mime-type="image/png"/></draw:frame></text:p>
        <text:p text:style-name="P1">A Memory Dump is considered <text:span text:style-name="T1">explored successfully</text:span> if you manage to perform a <draw:frame draw:style-name="fr1" draw:name="UUID128" text:anchor-type="as-char" svg:width="0.411cm" svg:height="0.411cm" draw:z-index="134"><draw:image xlink:href="Pictures/1000000100000064000000646B7D824BAC4ED5C6.png" xlink:type="simple" xlink:show="embed" xlink:actuate="onLoad" draw:mime-type="image/png"/></draw:frame><text:s/>Move action on the card with a crown. If you have to lose 1 or more <draw:frame draw:style-name="fr1" draw:name="UUID129" text:anchor-type="as-char" svg:width="0.411cm" svg:height="0.411cm" draw:z-index="135"><draw:image xlink:href="Pictures/10000001000000640000006445BD65E4E0981768.png" xlink:type="simple" xlink:show="embed" xlink:actuate="onLoad" draw:mime-type="image/png"/></draw:frame><text:s/>Health resources, but you have none, the Memory Dump exploration <text:span text:style-name="T1">ends with a failure</text:span>.</text:p>
        <text:p text:style-name="Standard"/>
        <table:table table:name="Tabella14" table:style-name="Tabella14">
          <table:table-column table:style-name="Tabella14.A"/>
          <table:table-row table:style-name="Tabella14.1">
            <table:table-cell table:style-name="Tabella14.A1" office:value-type="string">
              <text:p text:style-name="P1">Often, the crowned card features an illustration of some sort of exit - from which we assumed that was the purpose of the Ancient Stampadians. A mathematical formula is also printed to calculate some sort of score. Since these are dumps of past events, we don't know exactly what this score is for. For now, you can use it to compare the results of your exploration with your friends.</text:p>
            </table:table-cell>
          </table:table-row>
        </table:table>
        <text:p text:style-name="Standard"/>
        <text:p text:style-name="P4">Saving and Loading</text:p>
        <text:p text:style-name="Standard"/>
        <text:p text:style-name="P1">If no cards are activating or are about to activate, you can <text:span text:style-name="T1">save the current game</text:span> to resume later.</text:p>
        <text:p text:style-name="Standard"/>
        <text:p text:style-name="P1"><draw:frame draw:style-name="fr2" draw:name="UUID130" text:anchor-type="char" svg:width="8.25cm" svg:height="4.288cm" draw:z-index="153"><draw:image xlink:href="Pictures/10000001000007D0000004102E3B3ABD4D448522.png" xlink:type="simple" xlink:show="embed" xlink:actuate="onLoad" draw:mime-type="image/png"/></draw:frame></text:p>
        <text:p text:style-name="P1">To <text:span text:style-name="T1">save your game</text:span>, write your current cell name and the card number arranged in the Sight Area on the top right of the Map Sheet as it is oriented, following the Move effect format. Form a face-up deck with all of the face-up cards on the table (Sight Area, Long Term Area, Short Term Area, and Hippocampus Area) and put it on the face-down Forgotten Deck. Store this deck, the Map Sheet, and the Character Sheet together.</text:p>
        <text:p text:style-name="P1">To <text:span text:style-name="T1">load your game</text:span>, collect all the materials and split the deck into two. The smallest deck is the Forgotten Deck and must be kept aside face-down. Form the Long Term Area and Short Term Area with the remaining cards. Rotate the map to the saved game side and arrange the Sight Area according to the instructions you wrote in the top right, leaving the Hippocampus Area empty. Finally, put the Character Sheet under the Sight Area and erase the instructions.</text:p>
        <text:p text:style-name="Standard"/>
        <table:table table:name="Tabella15" table:style-name="Tabella15">
          <table:table-column table:style-name="Tabella15.A"/>
          <table:table-row table:style-name="Tabella15.1">
            <table:table-cell table:style-name="Tabella15.A1" office:value-type="string">
              <text:p text:style-name="P1">There is no need to save and restore the Hippocampus Area zone: its purpose is to help you prepare the Sight Area as you move from zone to zone.</text:p>
            </table:table-cell>
          </table:table-row>
        </table:table>
        <text:p text:style-name="Standard"/>
        <text:p text:style-name="P4"/>
        <text:p text:style-name="P4"><text:soft-page-break/>Extra Game Modes</text:p>
        <text:p text:style-name="Standard"/>
        <text:p text:style-name="P1"><text:span text:style-name="T1">Want to see who the fastest explorer is?</text:span> Start a timer at the beginning of the game and successfully explore a Memory Dump the fastest you can!</text:p>
        <text:p text:style-name="Standard"/>
        <text:p text:style-name="P1"><text:span text:style-name="T1">Do you prefer a more relaxed exploration?</text:span> When you have to lose more <draw:frame draw:style-name="fr1" draw:name="UUID131" text:anchor-type="as-char" svg:width="0.411cm" svg:height="0.411cm" draw:z-index="136"><draw:image xlink:href="Pictures/10000001000000640000006445BD65E4E0981768.png" xlink:type="simple" xlink:show="embed" xlink:actuate="onLoad" draw:mime-type="image/png"/></draw:frame><text:s/>Health than you have, lose <draw:frame draw:style-name="fr1" draw:name="UUID132" text:anchor-type="as-char" svg:width="0.411cm" svg:height="0.411cm" draw:z-index="137"><draw:image xlink:href="Pictures/1000000100000064000000648813B6AC09DB83E9.png" xlink:type="simple" xlink:show="embed" xlink:actuate="onLoad" draw:mime-type="image/png"/></draw:frame><text:s/>Strength by the remaining amount instead. If you run out of Strength too, gain <draw:frame draw:style-name="fr1" draw:name="UUID133" text:anchor-type="as-char" svg:width="0.411cm" svg:height="0.411cm" draw:z-index="138"><draw:image xlink:href="Pictures/10000001000000640000006417BFF191A6565D1D.png" xlink:type="simple" xlink:show="embed" xlink:actuate="onLoad" draw:mime-type="image/png"/></draw:frame><text:s/>by the remaining amount instead.</text:p>
        <text:p text:style-name="Standard"/>
        <text:p text:style-name="P4">That's All...</text:p>
        <text:p text:style-name="Standard"/>
        <text:p text:style-name="P1"><draw:frame draw:style-name="fr2" draw:name="UUID134" text:anchor-type="char" svg:width="8.25cm" svg:height="4.288cm" draw:z-index="84"><draw:image xlink:href="Pictures/10000001000007D0000004108240299E2D0363CF.png" xlink:type="simple" xlink:show="embed" xlink:actuate="onLoad" draw:mime-type="image/png"/></draw:frame></text:p>
        <text:p text:style-name="P1">This is the information we've gleaned from analyzing the floppy disks so far: it should be enough to begin exploring your first memory dumps. But there's much more to discover: there are symbols to interpret, procedures and rituals to reconstruct, people to identify, and monsters to fight. Don't be afraid to get creative. Don't even be afraid to cheat a little when things get complicated, especially in your first few games. And don't give up, because we need you. Help us discover the purpose of these memory dumps.</text:p>
        <text:p text:style-name="Standard"/>
        <table:table table:name="Tabella16" table:style-name="Tabella16">
          <table:table-column table:style-name="Tabella16.A"/>
          <table:table-row table:style-name="Tabella16.1">
            <table:table-cell table:style-name="Tabella16.A1" office:value-type="string">
              <text:p text:style-name="P2">MOS3D is an open-source project: https://github.com/kesiev/stampadia-mazes. Very special thanks to <text:span text:style-name="T1">Bianca</text:span>, <text:span text:style-name="T1">Preuk</text:span>, and all the Stampadians out there.</text:p>
            </table:table-cell>
          </table:table-row>
        </table:table>
        <text:p text:style-name="P5">Our Translations</text:p>
        <text:p text:style-name="Standard"/>
        <table:table table:name="Tabella17" table:style-name="Tabella17">
          <table:table-column table:style-name="Tabella17.A"/>
          <table:table-row table:style-name="Tabella17.1">
            <table:table-cell table:style-name="Tabella17.A1" office:value-type="string">
              <text:p text:style-name="P1">Understanding the meaning behind some of the cards can be a daunting challenge. That's why we've decided to share our interpretation of some of the cards we found during our analysis. <text:span text:style-name="T1">If you'd rather test yourself and do it on your own, don't read on!</text:span></text:p>
            </table:table-cell>
          </table:table-row>
        </table:table>
        <text:p text:style-name="Standard"/>
        <text:p text:style-name="P4">Card 1</text:p>
        <text:p text:style-name="Standard"/>
        <text:p text:style-name="P1"><draw:frame draw:style-name="fr2" draw:name="UUID135" text:anchor-type="char" svg:width="8.25cm" svg:height="4.288cm" draw:z-index="88"><draw:image xlink:href="Pictures/10000001000007D0000004109782046A1B1A6C96.png" xlink:type="simple" xlink:show="embed" xlink:actuate="onLoad" draw:mime-type="image/png"/></draw:frame></text:p>
        <text:p text:style-name="P1">As this card has a star-shaped <draw:frame draw:style-name="fr1" draw:name="UUID136" text:anchor-type="as-char" svg:width="0.674cm" svg:height="0.411cm" draw:z-index="139"><draw:image xlink:href="Pictures/10000001000000A400000064105341F3A17CE00B.png" xlink:type="simple" xlink:show="embed" xlink:actuate="onLoad" draw:mime-type="image/png"/></draw:frame><text:s/>tab, it activates as it is arranged into the Sight Area. There is no symbol in the center, so it can't be activated in any other way.</text:p>
        <text:p text:style-name="Standard"/>
        <text:p text:style-name="P1"><draw:frame draw:style-name="fr1" draw:name="UUID137" text:anchor-type="as-char" svg:width="0.411cm" svg:height="0.411cm" draw:z-index="140"><draw:image xlink:href="Pictures/10000001000000640000006436DE474D9C193B3D.png" xlink:type="simple" xlink:show="embed" xlink:actuate="onLoad" draw:mime-type="image/png"/></draw:frame><text:s/>First, roll one die. Then, decide to offer from 0 to 5 Strength resources. Sum these values to get the Action Power.</text:p>
        <text:p text:style-name="P1"><draw:frame draw:style-name="fr1" draw:name="UUID138" text:anchor-type="as-char" svg:width="0.411cm" svg:height="0.411cm" draw:z-index="141"><draw:image xlink:href="Pictures/100000010000006400000064593EF5D0ABAB03F5.png" xlink:type="simple" xlink:show="embed" xlink:actuate="onLoad" draw:mime-type="image/png"/></draw:frame><text:s/>If you can lose one Curse resource, do it and reduce the Action Power by one. As the condition ends with a colon, you <text:span text:style-name="T1">must do it</text:span> if possible.</text:p>
        <text:p text:style-name="P1"><draw:frame draw:style-name="fr1" draw:name="UUID139" text:anchor-type="as-char" svg:width="0.411cm" svg:height="0.411cm" draw:z-index="142"><draw:image xlink:href="Pictures/10000001000000640000006448F9F31E2308037E.png" xlink:type="simple" xlink:show="embed" xlink:actuate="onLoad" draw:mime-type="image/png"/></draw:frame><text:s/>If the resulting Action Power is greater than 3, gain 1 Gold resource.</text:p>
        <text:p text:style-name="P1"><draw:frame draw:style-name="fr1" draw:name="UUID140" text:anchor-type="as-char" svg:width="0.411cm" svg:height="0.411cm" draw:z-index="143"><draw:image xlink:href="Pictures/1000000100000064000000647F111E6C6588B849.png" xlink:type="simple" xlink:show="embed" xlink:actuate="onLoad" draw:mime-type="image/png"/></draw:frame><text:s/>If the resulting Action Power is less than 3, gain 1 Strength resource.</text:p>
        <text:p text:style-name="P1"><draw:frame draw:style-name="fr1" draw:name="UUID141" text:anchor-type="as-char" svg:width="0.411cm" svg:height="0.411cm" draw:z-index="144"><draw:image xlink:href="Pictures/100000010000006400000064B811DB04FA0728B6.png" xlink:type="simple" xlink:show="embed" xlink:actuate="onLoad" draw:mime-type="image/png"/></draw:frame><text:s/>If you are in Cell E and the Action power is less than 4, lose 1 Health resource. Conditions can trigger another condition instead of an action!</text:p>
        <text:p text:style-name="P1"><draw:frame draw:style-name="fr1" draw:name="UUID142" text:anchor-type="as-char" svg:width="0.411cm" svg:height="0.411cm" draw:z-index="145"><draw:image xlink:href="Pictures/1000000100000064000000641488C0188597186B.png" xlink:type="simple" xlink:show="embed" xlink:actuate="onLoad" draw:mime-type="image/png"/></draw:frame><text:s/>If you are in Cell S instead and the Action power is less than 4, gain 1 Curse resource.</text:p>
        <text:p text:style-name="Standard"/>
        <table:table table:name="Tabella18" table:style-name="Tabella18">
          <table:table-column table:style-name="Tabella18.A"/>
          <table:table-row table:style-name="Tabella18.1">
            <table:table-cell table:style-name="Tabella18.A1" office:value-type="string">
              <text:p text:style-name="P1">We think that these rules schematize some kind of combat, where the fighter can react by applying more or less force to the blow.</text:p>
            </table:table-cell>
          </table:table-row>
        </table:table>
        <text:p text:style-name="Standard"/>
        <text:p text:style-name="P4">Card 2</text:p>
        <text:p text:style-name="Standard"/>
        <text:p text:style-name="P1"><draw:frame draw:style-name="fr2" draw:name="UUID143" text:anchor-type="char" svg:width="8.25cm" svg:height="4.288cm" draw:z-index="151"><draw:image xlink:href="Pictures/10000001000007D000000410282D63EBE2ED24A1.png" xlink:type="simple" xlink:show="embed" xlink:actuate="onLoad" draw:mime-type="image/png"/></draw:frame></text:p>
        <text:p text:style-name="P1">As this card has a round-shaped <draw:frame draw:style-name="fr1" draw:name="UUID144" text:anchor-type="as-char" svg:width="0.674cm" svg:height="0.411cm" draw:z-index="146"><draw:image xlink:href="Pictures/10000001000000A40000006486E0E11AC61FE69C.png" xlink:type="simple" xlink:show="embed" xlink:actuate="onLoad" draw:mime-type="image/png"/></draw:frame><text:s/>tab with a balloon icon on it, you can activate the card by performing a Talk action.</text:p>
        <text:p text:style-name="Standard"/>
        <text:p text:style-name="P1"><draw:frame draw:style-name="fr1" draw:name="UUID145" text:anchor-type="as-char" svg:width="0.411cm" svg:height="0.411cm" draw:z-index="147"><draw:image xlink:href="Pictures/10000001000000640000006436DE474D9C193B3D.png" xlink:type="simple" xlink:show="embed" xlink:actuate="onLoad" draw:mime-type="image/png"/></draw:frame><text:s/>Roll 5 dice. Then, for 3 times, you can select from 0 to 5 of them and reroll.</text:p>
        <text:p text:style-name="P1"><draw:frame draw:style-name="fr1" draw:name="UUID146" text:anchor-type="as-char" svg:width="0.411cm" svg:height="0.411cm" draw:z-index="1"><draw:image xlink:href="Pictures/100000010000006400000064593EF5D0ABAB03F5.png" xlink:type="simple" xlink:show="embed" xlink:actuate="onLoad" draw:mime-type="image/png"/></draw:frame><text:s/>If the sum of a dice set composed of a 4, a 5, a 6, and all other dice is greater than 21, gain 1 Screw resource.</text:p>
        <text:p text:style-name="P1"><draw:frame draw:style-name="fr1" draw:name="UUID147" text:anchor-type="as-char" svg:width="0.411cm" svg:height="0.411cm" draw:z-index="2"><draw:image xlink:href="Pictures/10000001000000640000006448F9F31E2308037E.png" xlink:type="simple" xlink:show="embed" xlink:actuate="onLoad" draw:mime-type="image/png"/></draw:frame><text:s/>If the sum of a dice set composed of a 4, a 5, a 6, and all other dice is greater than 23, gain 1 Screw resource. That means that, with a 24, you get 2 Screws: this one and the one from the previous line.</text:p>
        <text:p text:style-name="P1"><draw:frame draw:style-name="fr1" draw:name="UUID148" text:anchor-type="as-char" svg:width="0.411cm" svg:height="0.411cm" draw:z-index="12"><draw:image xlink:href="Pictures/1000000100000064000000647F111E6C6588B849.png" xlink:type="simple" xlink:show="embed" xlink:actuate="onLoad" draw:mime-type="image/png"/></draw:frame><text:s/>If the sum of a dice set composed of a 4, a 5, a 6, and all other dice is greater than 24, gain 2 Screws resource. With a 25, you get 4 Screws in total!</text:p>
        <text:p text:style-name="P1"><draw:frame draw:style-name="fr1" draw:name="UUID149" text:anchor-type="as-char" svg:width="0.411cm" svg:height="0.411cm" draw:z-index="17"><draw:image xlink:href="Pictures/100000010000006400000064B811DB04FA0728B6.png" xlink:type="simple" xlink:show="embed" xlink:actuate="onLoad" draw:mime-type="image/png"/></draw:frame><text:s/>If you can lose 3 Screws and <text:span text:style-name="T1">you want to do that</text:span> (due to the question mark after the condition), you get 1 Strength resource.</text:p>
        <text:p text:style-name="P1"><draw:frame draw:style-name="fr1" draw:name="UUID150" text:anchor-type="as-char" svg:width="0.411cm" svg:height="0.411cm" draw:z-index="25"><draw:image xlink:href="Pictures/1000000100000064000000641488C0188597186B.png" xlink:type="simple" xlink:show="embed" xlink:actuate="onLoad" draw:mime-type="image/png"/></draw:frame><text:s/>If you can lose 5 Screws and <text:span text:style-name="T1">you want to do that</text:span>, swap the 14A card in any area with the 14B card in the Forgotten Deck.</text:p>
        <text:p text:style-name="Standard"/>
        <table:table table:name="Tabella19" table:style-name="Tabella19">
          <table:table-column table:style-name="Tabella19.A"/>
          <table:table-row table:style-name="Tabella19.1">
            <table:table-cell table:style-name="Tabella19.A1" office:value-type="string">
              <text:p text:style-name="P1">This card appears to illustrate the rules of a dice game very similar to one known in our world as "Ship, Captain, and Crew." During our tests, several such games appeared, activated by "talking" to hooded figures, who exchanged their prizes for useful items or even opening locked passages. From this, we imagined that the Stampadians were particularly fond of dice games.</text:p>
            </table:table-cell>
          </table:table-row>
        </table:table>
        <text:p text:style-name="Standard"/>
        <text:p text:style-name="P4"/>
        <text:p text:style-name="P4"/>
        <text:p text:style-name="P4"><text:soft-page-break/>Card 3</text:p>
        <text:p text:style-name="Standard"/>
        <text:p text:style-name="P1"><draw:frame draw:style-name="fr2" draw:name="UUID151" text:anchor-type="char" svg:width="8.25cm" svg:height="4.288cm" draw:z-index="150"><draw:image xlink:href="Pictures/10000001000007D00000041038A8F7C960135CDF.png" xlink:type="simple" xlink:show="embed" xlink:actuate="onLoad" draw:mime-type="image/png"/></draw:frame></text:p>
        <text:p text:style-name="P1">As this card has a round-shaped <draw:frame draw:style-name="fr1" draw:name="UUID152" text:anchor-type="as-char" svg:width="0.674cm" svg:height="0.411cm" draw:z-index="36"><draw:image xlink:href="Pictures/10000001000000A40000006486E0E11AC61FE69C.png" xlink:type="simple" xlink:show="embed" xlink:actuate="onLoad" draw:mime-type="image/png"/></draw:frame><text:s/>tab with a hand icon on it, you can activate the card by performing a Use action.</text:p>
        <text:p text:style-name="Standard"/>
        <text:p text:style-name="P1"><draw:frame draw:style-name="fr1" draw:name="UUID153" text:anchor-type="as-char" svg:width="0.411cm" svg:height="0.411cm" draw:z-index="38"><draw:image xlink:href="Pictures/10000001000000640000006436DE474D9C193B3D.png" xlink:type="simple" xlink:show="embed" xlink:actuate="onLoad" draw:mime-type="image/png"/></draw:frame><text:s/>There may be garbage text, symbols, math formulas with variables, etc. We've blanked it as we didn't understand any of them.</text:p>
        <text:p text:style-name="P1"><draw:frame draw:style-name="fr1" draw:name="UUID154" text:anchor-type="as-char" svg:width="0.411cm" svg:height="0.411cm" draw:z-index="50"><draw:image xlink:href="Pictures/100000010000006400000064593EF5D0ABAB03F5.png" xlink:type="simple" xlink:show="embed" xlink:actuate="onLoad" draw:mime-type="image/png"/></draw:frame><text:s/>If "4" and you want to do it, then gain 1 Apple resource. We don't know what "4" means.</text:p>
        <text:p text:style-name="P1"><draw:frame draw:style-name="fr1" draw:name="UUID155" text:anchor-type="as-char" svg:width="0.411cm" svg:height="0.411cm" draw:z-index="61"><draw:image xlink:href="Pictures/10000001000000640000006448F9F31E2308037E.png" xlink:type="simple" xlink:show="embed" xlink:actuate="onLoad" draw:mime-type="image/png"/></draw:frame><text:s/>If "3" and you want to do it, then gain 1 Snail resource. We don't know what "3" means.</text:p>
        <text:p text:style-name="P1"><draw:frame draw:style-name="fr1" draw:name="UUID156" text:anchor-type="as-char" svg:width="0.411cm" svg:height="0.411cm" draw:z-index="71"><draw:image xlink:href="Pictures/1000000100000064000000647F111E6C6588B849.png" xlink:type="simple" xlink:show="embed" xlink:actuate="onLoad" draw:mime-type="image/png"/></draw:frame><text:s/>If "2" and you want to do it, then gain 1 Envelope resource. We don't know what "2" means.</text:p>
        <text:p text:style-name="P1"><draw:frame draw:style-name="fr1" draw:name="UUID157" text:anchor-type="as-char" svg:width="0.411cm" svg:height="0.411cm" draw:z-index="75"><draw:image xlink:href="Pictures/100000010000006400000064B811DB04FA0728B6.png" xlink:type="simple" xlink:show="embed" xlink:actuate="onLoad" draw:mime-type="image/png"/></draw:frame><text:s/>If you have at least 1 Apple, 1 Snail, or 1 Envelope, swap the 17A card in any area with the 17B card in the Forgotten Deck.</text:p>
        <text:p text:style-name="Standard"/>
        <table:table table:name="Tabella20" table:style-name="Tabella20">
          <table:table-column table:style-name="Tabella20.A"/>
          <table:table-row table:style-name="Tabella20.1">
            <table:table-cell table:style-name="Tabella20.A1" office:value-type="string">
              <text:p text:style-name="P1">We have no idea what this card means. We know that you need to get at least one resource to swap one of the cards.</text:p>
            </table:table-cell>
          </table:table-row>
        </table:table>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errum" svg:font-family="Ferr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shat" svg:font-family="Seshat"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04T11:43:29.419000000</meta:creation-date>
    <meta:editing-duration>PT2M37S</meta:editing-duration>
    <meta:editing-cycles>2</meta:editing-cycles>
    <meta:generator>LibreOffice/7.2.2.2$Windows_X86_64 LibreOffice_project/02b2acce88a210515b4a5bb2e46cbfb63fe97d56</meta:generator>
    <dc:date>2026-06-04T11:46:05.804000000</dc:date>
    <meta:document-statistic meta:table-count="20" meta:image-count="157" meta:object-count="0" meta:page-count="9" meta:paragraph-count="118" meta:word-count="3709" meta:character-count="20342" meta:non-whitespace-character-count="16664"/>
  </office:meta>
</office:document-meta>
</file>